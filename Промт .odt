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">
      <style:table-properties style:width="15.69cm" style:page-number="auto" table:align="left"/>
    </style:style>
    <style:style style:name="Таблица1.A" style:family="table-column">
      <style:table-column-properties style:column-width="7.964cm"/>
    </style:style>
    <style:style style:name="Таблица1.B" style:family="table-column">
      <style:table-column-properties style:column-width="2.037cm"/>
    </style:style>
    <style:style style:name="Таблица1.C" style:family="table-column">
      <style:table-column-properties style:column-width="2.461cm"/>
    </style:style>
    <style:style style:name="Таблица1.D" style:family="table-column">
      <style:table-column-properties style:column-width="3.228cm"/>
    </style:style>
    <style:style style:name="Таблица1.1" style:family="table-row">
      <style:table-row-properties style:min-row-height="1.27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6.826cm" table:align="left"/>
    </style:style>
    <style:style style:name="Таблица2.A" style:family="table-column">
      <style:table-column-properties style:column-width="1.693cm"/>
    </style:style>
    <style:style style:name="Таблица2.B" style:family="table-column">
      <style:table-column-properties style:column-width="5.133cm"/>
    </style:style>
    <style:style style:name="Таблица2.1" style:family="table-row">
      <style:table-row-properties style:min-row-height="0.503cm"/>
    </style:style>
    <style:style style:name="Таблица2.A1" style:family="table-cell">
      <style:table-cell-properties style:vertical-align="middle"/>
    </style:style>
    <style:style style:name="Таблица3" style:family="table" style:master-page-name="">
      <style:table-properties style:width="6.773cm" style:page-number="auto" table:align="left"/>
    </style:style>
    <style:style style:name="Таблица3.A" style:family="table-column">
      <style:table-column-properties style:column-width="1.693cm"/>
    </style:style>
    <style:style style:name="Таблица3.B" style:family="table-column">
      <style:table-column-properties style:column-width="5.08cm"/>
    </style:style>
    <style:style style:name="Таблица3.1" style:family="table-row">
      <style:table-row-properties style:min-row-height="0.503cm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6.668cm" table:align="left"/>
    </style:style>
    <style:style style:name="Таблица4.A" style:family="table-column">
      <style:table-column-properties style:column-width="1.667cm"/>
    </style:style>
    <style:style style:name="Таблица4.B" style:family="table-column">
      <style:table-column-properties style:column-width="5.001cm"/>
    </style:style>
    <style:style style:name="Таблица4.1" style:family="table-row">
      <style:table-row-properties style:min-row-height="0.529cm"/>
    </style:style>
    <style:style style:name="Таблица4.A1" style:family="table-cell">
      <style:table-cell-properties style:vertical-align="middle"/>
    </style:style>
    <style:style style:name="Таблица8" style:family="table">
      <style:table-properties style:width="5.292cm" table:align="left"/>
    </style:style>
    <style:style style:name="Таблица8.A" style:family="table-column">
      <style:table-column-properties style:column-width="4.18cm"/>
    </style:style>
    <style:style style:name="Таблица8.B" style:family="table-column">
      <style:table-column-properties style:column-width="1.111cm"/>
    </style:style>
    <style:style style:name="Таблица8.1" style:family="table-row">
      <style:table-row-properties style:min-row-height="0.529cm"/>
    </style:style>
    <style:style style:name="Таблица8.A1" style:family="table-cell">
      <style:table-cell-properties style:vertical-align="middle"/>
    </style:style>
    <style:style style:name="Таблица9" style:family="table">
      <style:table-properties style:width="5.292cm" table:align="left"/>
    </style:style>
    <style:style style:name="Таблица9.A" style:family="table-column">
      <style:table-column-properties style:column-width="4.18cm"/>
    </style:style>
    <style:style style:name="Таблица9.B" style:family="table-column">
      <style:table-column-properties style:column-width="1.111cm"/>
    </style:style>
    <style:style style:name="Таблица9.1" style:family="table-row">
      <style:table-row-properties style:min-row-height="1.349cm"/>
    </style:style>
    <style:style style:name="Таблица9.A1" style:family="table-cell">
      <style:table-cell-properties style:vertical-align="middle"/>
    </style:style>
    <style:style style:name="Таблица9.2" style:family="table-row">
      <style:table-row-properties style:min-row-height="0.529cm"/>
    </style:style>
    <style:style style:name="Таблица10" style:family="table">
      <style:table-properties style:width="5.292cm" table:align="left"/>
    </style:style>
    <style:style style:name="Таблица10.A" style:family="table-column">
      <style:table-column-properties style:column-width="4.18cm"/>
    </style:style>
    <style:style style:name="Таблица10.B" style:family="table-column">
      <style:table-column-properties style:column-width="1.111cm"/>
    </style:style>
    <style:style style:name="Таблица10.1" style:family="table-row">
      <style:table-row-properties style:min-row-height="0.529cm"/>
    </style:style>
    <style:style style:name="Таблица10.A1" style:family="table-cell">
      <style:table-cell-properties style:vertical-align="middle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fo:font-weight="normal" style:font-weight-asian="normal" style:font-weight-complex="normal"/>
    </style:style>
    <style:style style:name="P5" style:family="paragraph" style:parent-style-name="Text_20_body" style:list-style-name="L2"/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 style:list-style-name="L1">
      <style:text-properties fo:font-weight="normal" style:font-weight-asian="normal" style:font-weight-complex="normal"/>
    </style:style>
    <style:style style:name="P8" style:family="paragraph" style:parent-style-name="Text_20_body" style:list-style-name="L3">
      <style:text-properties fo:font-weight="normal" style:font-weight-asian="normal" style:font-weight-complex="normal"/>
    </style:style>
    <style:style style:name="P9" style:family="paragraph" style:parent-style-name="Text_20_body" style:list-style-name="L2">
      <style:text-properties fo:font-weight="normal" style:font-weight-asian="normal" style:font-weight-complex="normal"/>
    </style:style>
    <style:style style:name="P10" style:family="paragraph" style:parent-style-name="Text_20_body" style:list-style-name="L14">
      <style:text-properties fo:font-weight="normal" style:font-weight-asian="normal" style:font-weight-complex="normal"/>
    </style:style>
    <style:style style:name="P11" style:family="paragraph" style:parent-style-name="Text_20_body" style:list-style-name="L15">
      <style:text-properties fo:font-weight="normal" style:font-weight-asian="normal" style:font-weight-complex="normal"/>
    </style:style>
    <style:style style:name="P12" style:family="paragraph" style:parent-style-name="Text_20_body" style:list-style-name="L16">
      <style:text-properties fo:font-weight="normal" style:font-weight-asian="normal" style:font-weight-complex="normal"/>
    </style:style>
    <style:style style:name="P13" style:family="paragraph" style:parent-style-name="Text_20_body" style:list-style-name="L17">
      <style:text-properties fo:font-weight="normal" style:font-weight-asian="normal" style:font-weight-complex="normal"/>
    </style:style>
    <style:style style:name="P14" style:family="paragraph" style:parent-style-name="Text_20_body" style:list-style-name="L18">
      <style:text-properties fo:font-weight="normal" style:font-weight-asian="normal" style:font-weight-complex="normal"/>
    </style:style>
    <style:style style:name="P15" style:family="paragraph" style:parent-style-name="Text_20_body" style:list-style-name="L19"/>
    <style:style style:name="P16" style:family="paragraph" style:parent-style-name="Text_20_body" style:list-style-name="L20"/>
    <style:style style:name="P17" style:family="paragraph" style:parent-style-name="Text_20_body" style:list-style-name="L21"/>
    <style:style style:name="P18" style:family="paragraph" style:parent-style-name="Text_20_body" style:list-style-name="L22"/>
    <style:style style:name="P19" style:family="paragraph" style:parent-style-name="Text_20_body" style:list-style-name="L23"/>
    <style:style style:name="P20" style:family="paragraph" style:parent-style-name="Text_20_body" style:list-style-name="L24"/>
    <style:style style:name="P21" style:family="paragraph" style:parent-style-name="Text_20_body" style:list-style-name="L25"/>
    <style:style style:name="P22" style:family="paragraph" style:parent-style-name="Text_20_body" style:list-style-name="L26"/>
    <style:style style:name="P23" style:family="paragraph" style:parent-style-name="Text_20_body" style:list-style-name="L27"/>
    <style:style style:name="P24" style:family="paragraph" style:parent-style-name="Text_20_body" style:list-style-name="L28"/>
    <style:style style:name="P25" style:family="paragraph" style:parent-style-name="Text_20_body" style:list-style-name="L29"/>
    <style:style style:name="P26" style:family="paragraph" style:parent-style-name="Text_20_body" style:list-style-name="L30"/>
    <style:style style:name="P27" style:family="paragraph" style:parent-style-name="Text_20_body" style:list-style-name="L31"/>
    <style:style style:name="P28" style:family="paragraph" style:parent-style-name="Text_20_body" style:list-style-name="L32"/>
    <style:style style:name="P29" style:family="paragraph" style:parent-style-name="Text_20_body" style:list-style-name="L33"/>
    <style:style style:name="P30" style:family="paragraph" style:parent-style-name="Text_20_body" style:list-style-name="L34"/>
    <style:style style:name="P31" style:family="paragraph" style:parent-style-name="Text_20_body" style:list-style-name="L35"/>
    <style:style style:name="P32" style:family="paragraph" style:parent-style-name="Text_20_body" style:list-style-name="L36"/>
    <style:style style:name="P33" style:family="paragraph" style:parent-style-name="Text_20_body" style:list-style-name="L37"/>
    <style:style style:name="P34" style:family="paragraph" style:parent-style-name="Text_20_body" style:list-style-name="L38"/>
    <style:style style:name="P35" style:family="paragraph" style:parent-style-name="Text_20_body" style:list-style-name="L39"/>
    <style:style style:name="P36" style:family="paragraph" style:parent-style-name="Text_20_body" style:list-style-name="L40"/>
    <style:style style:name="P37" style:family="paragraph" style:parent-style-name="Text_20_body" style:list-style-name="L41"/>
    <style:style style:name="P38" style:family="paragraph" style:parent-style-name="Text_20_body" style:list-style-name="L42"/>
    <style:style style:name="P39" style:family="paragraph" style:parent-style-name="Text_20_body" style:list-style-name="L43"/>
    <style:style style:name="P40" style:family="paragraph" style:parent-style-name="Text_20_body" style:list-style-name="L44"/>
    <style:style style:name="P41" style:family="paragraph" style:parent-style-name="Text_20_body" style:list-style-name="L45"/>
    <style:style style:name="P42" style:family="paragraph" style:parent-style-name="Text_20_body" style:list-style-name="L46"/>
    <style:style style:name="P43" style:family="paragraph" style:parent-style-name="Text_20_body" style:list-style-name="L47"/>
    <style:style style:name="P44" style:family="paragraph" style:parent-style-name="Text_20_body" style:list-style-name="L48"/>
    <style:style style:name="P45" style:family="paragraph" style:parent-style-name="Text_20_body" style:list-style-name="L49"/>
    <style:style style:name="P46" style:family="paragraph" style:parent-style-name="Text_20_body" style:list-style-name="L50"/>
    <style:style style:name="P47" style:family="paragraph" style:parent-style-name="Text_20_body" style:list-style-name="L51"/>
    <style:style style:name="P48" style:family="paragraph" style:parent-style-name="Text_20_body" style:list-style-name="L52"/>
    <style:style style:name="P49" style:family="paragraph" style:parent-style-name="Text_20_body" style:list-style-name="L53"/>
    <style:style style:name="P50" style:family="paragraph" style:parent-style-name="Text_20_body" style:list-style-name="L54"/>
    <style:style style:name="P51" style:family="paragraph" style:parent-style-name="Text_20_body" style:list-style-name="L55"/>
    <style:style style:name="P52" style:family="paragraph" style:parent-style-name="Text_20_body" style:list-style-name="L56"/>
    <style:style style:name="P53" style:family="paragraph" style:parent-style-name="Text_20_body" style:list-style-name="L57"/>
    <style:style style:name="P54" style:family="paragraph" style:parent-style-name="Text_20_body" style:list-style-name="L58"/>
    <style:style style:name="P55" style:family="paragraph" style:parent-style-name="Text_20_body" style:list-style-name="L59"/>
    <style:style style:name="P56" style:family="paragraph" style:parent-style-name="Text_20_body" style:list-style-name="L60"/>
    <style:style style:name="P57" style:family="paragraph" style:parent-style-name="Text_20_body" style:list-style-name="L61"/>
    <style:style style:name="P58" style:family="paragraph" style:parent-style-name="Text_20_body" style:list-style-name="L62"/>
    <style:style style:name="P59" style:family="paragraph" style:parent-style-name="Text_20_body" style:list-style-name="L63"/>
    <style:style style:name="P60" style:family="paragraph" style:parent-style-name="Text_20_body" style:list-style-name="L15">
      <style:paragraph-properties fo:margin-top="0cm" fo:margin-bottom="0cm"/>
      <style:text-properties fo:language="ru" fo:country="RU" fo:font-weight="normal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cm"/>
      <style:text-properties fo:font-weight="normal" style:font-weight-asian="normal" style:font-weight-complex="normal"/>
    </style:style>
    <style:style style:name="P62" style:family="paragraph" style:parent-style-name="Text_20_body" style:list-style-name="L3">
      <style:paragraph-properties fo:margin-top="0cm" fo:margin-bottom="0cm"/>
      <style:text-properties fo:font-weight="normal" style:font-weight-asian="normal" style:font-weight-complex="normal"/>
    </style:style>
    <style:style style:name="P63" style:family="paragraph" style:parent-style-name="Text_20_body" style:list-style-name="L2">
      <style:paragraph-properties fo:margin-top="0cm" fo:margin-bottom="0cm"/>
      <style:text-properties fo:font-weight="normal" style:font-weight-asian="normal" style:font-weight-complex="normal"/>
    </style:style>
    <style:style style:name="P64" style:family="paragraph" style:parent-style-name="Text_20_body" style:list-style-name="L14">
      <style:paragraph-properties fo:margin-top="0cm" fo:margin-bottom="0cm"/>
      <style:text-properties fo:font-weight="normal" style:font-weight-asian="normal" style:font-weight-complex="normal"/>
    </style:style>
    <style:style style:name="P65" style:family="paragraph" style:parent-style-name="Text_20_body" style:list-style-name="L15">
      <style:paragraph-properties fo:margin-top="0cm" fo:margin-bottom="0cm"/>
      <style:text-properties fo:font-weight="normal" style:font-weight-asian="normal" style:font-weight-complex="normal"/>
    </style:style>
    <style:style style:name="P66" style:family="paragraph" style:parent-style-name="Text_20_body" style:list-style-name="L16">
      <style:paragraph-properties fo:margin-top="0cm" fo:margin-bottom="0cm"/>
      <style:text-properties fo:font-weight="normal" style:font-weight-asian="normal" style:font-weight-complex="normal"/>
    </style:style>
    <style:style style:name="P67" style:family="paragraph" style:parent-style-name="Text_20_body" style:list-style-name="L17">
      <style:paragraph-properties fo:margin-top="0cm" fo:margin-bottom="0cm"/>
      <style:text-properties fo:font-weight="normal" style:font-weight-asian="normal" style:font-weight-complex="normal"/>
    </style:style>
    <style:style style:name="P68" style:family="paragraph" style:parent-style-name="Text_20_body" style:list-style-name="L18">
      <style:paragraph-properties fo:margin-top="0cm" fo:margin-bottom="0cm"/>
      <style:text-properties fo:font-weight="normal" style:font-weight-asian="normal" style:font-weight-complex="normal"/>
    </style:style>
    <style:style style:name="P69" style:family="paragraph" style:parent-style-name="Table_20_Contents">
      <style:text-properties fo:font-weight="normal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weight="normal" style:font-weight-asian="normal" style:font-weight-complex="normal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text:number-lines="false" text:line-number="0"/>
    </style:style>
    <style:style style:name="P73" style:family="paragraph" style:parent-style-name="Table_20_Contents">
      <style:paragraph-properties fo:margin-left="0cm" fo:margin-right="0cm" fo:text-indent="0.45cm" style:auto-text-indent="false" text:number-lines="false" text:line-number="0"/>
      <style:text-properties fo:font-weight="normal" style:font-weight-asian="normal" style:font-weight-complex="normal"/>
    </style:style>
    <style:style style:name="P74" style:family="paragraph" style:parent-style-name="Table_20_Contents">
      <style:paragraph-properties fo:padding="0cm" fo:border="none"/>
    </style:style>
    <style:style style:name="P75" style:family="paragraph" style:parent-style-name="Table_20_Contents">
      <style:paragraph-properties fo:text-align="end" style:justify-single-word="false" fo:padding="0cm" fo:border="none"/>
    </style:style>
    <style:style style:name="P76" style:family="paragraph" style:parent-style-name="Table_20_Contents">
      <style:paragraph-properties fo:text-align="center" style:justify-single-word="false" fo:padding="0cm" fo:border="none"/>
    </style:style>
    <style:style style:name="P77" style:family="paragraph" style:parent-style-name="Preformatted_20_Text">
      <style:paragraph-properties fo:margin-top="0cm" fo:margin-bottom="0.499cm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1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number text:level="1" text:style-name="Numbering_20_Symbols" style:num-suffix="." style:num-format="1" text:start-value="2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Ты опытный фронтенд разработчик - твоя задача за один запрос написать полный код для кулинарной книни калькулятора на языке HTML - возьми как пример Раскладку на торт , как основу расчета готового изделия из таблицы. </text:span><text:span text:style-name="T2">С</text:span><text:span text:style-name="T3">охранение </text:span><text:span text:style-name="T2">рецепта. </text:span><text:span text:style-name="T3">Редактирование рецепт</text:span><text:span text:style-name="T2">а. <text:s/></text:span><text:span text:style-name="Strong_20_Emphasis"><text:span text:style-name="T2">Фото рецепта</text:span></text:span><text:span text:style-name="T2">— загрузка изображения. Удаление рецепта. </text:span></text:p>
      <text:p text:style-name="Text_20_body"><text:span text:style-name="T2">Интрефейс Выбор рецептов оформи в виде карусели на самом верху</text:span></text:p>
      <text:p text:style-name="P4">Ниже Отдельной контрастной кнопкой добавь форму таблицу списка состоящего из столбцов: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71">Ингридиент и составляющее</text:p>
          </table:table-cell>
          <table:table-cell table:style-name="Таблица1.A1" office:value-type="string">
            <text:p text:style-name="P73">Цена</text:p>
          </table:table-cell>
          <table:table-cell table:style-name="Таблица1.A1" office:value-type="string">
            <text:p text:style-name="P69"><text:span text:style-name="T1">По</text:span>раммовка <text:span text:style-name="T1">в упаковке</text:span></text:p>
          </table:table-cell>
          <table:table-cell table:style-name="Таблица1.A1" office:value-type="string">
            <text:p text:style-name="P69">Пограммовочная цена</text:p>
          </table:table-cell>
        </table:table-row>
      </table:table>
      <text:p text:style-name="P4">Где, ингредиент и составляющая, цена, пограммовка в упаковке вносится вручную. А пограммовочная цена определяется автоматически из расчета цена/пограммовку, определяется в рублях до тысячной после запятой. <text:s/>Все строки оформи как Перенос по словам, для удобства читабельности.</text:p>
      <text:p text:style-name="P4">Этот список предназначен как выпадающий список для всех рецептов книги, для определения ингредиентов в рецептах и их себестоимости в блоках рецептов.</text:p>
      <text:p text:style-name="Standard"><text:span text:style-name="T2">Для заполнения добавь кнопку импорт из таблиц Excel. </text:span></text:p>
      <text:p text:style-name="Standard"><text:span text:style-name="T2">Д</text:span><text:span text:style-name="T3">ля рецептов выведи отдельные вкладки с возможностью добавлять рицепт для распознавания, </text:span><text:span text:style-name="Strong_20_Emphasis"><text:span text:style-name="T3">Добавить рецепт по фото (распознавание)</text:span></text:span><text:span text:style-name="T3"><text:line-break/>Логика:</text:span></text:p>
      <text:list xml:id="list3022550008215241090" text:style-name="L2">
        <text:list-item>
          <text:p text:style-name="P63">Загружаете фото рецепта </text:p>
        </text:list-item>
        <text:list-item>
          <text:p text:style-name="P63">Вставляет<text:span text:style-name="T1">ся</text:span> распознанный текст (OCR) </text:p>
        </text:list-item>
        <text:list-item>
          <text:p text:style-name="P9">Система автоматически разбирает строки в ингредиенты <text:span text:style-name="T1">согласно описанному техническому изготовлению </text:span></text:p>
        </text:list-item>
        <text:list-item>
          <text:p text:style-name="P5"><text:span text:style-name="T2">Распознавание </text:span><text:span text:style-name="Strong_20_Emphasis"><text:span text:style-name="T2">из фото</text:span></text:span><text:span text:style-name="T2"> <text:line-break/>Поддержка:</text:span></text:p>
        </text:list-item>
      </text:list>
      <text:list xml:id="list6673203197586957681" text:style-name="L14">
        <text:list-item>
          <text:p text:style-name="P64">JPG </text:p>
        </text:list-item>
        <text:list-item>
          <text:p text:style-name="P64">PNG </text:p>
        </text:list-item>
        <text:list-item>
          <text:p text:style-name="P10">WEBP </text:p>
        </text:list-item>
      </text:list>
      <text:p text:style-name="Text_20_body"><text:span text:style-name="T3">Распознавание </text:span><text:span text:style-name="Strong_20_Emphasis"><text:span text:style-name="T3">из PDF</text:span></text:span><text:span text:style-name="T3"> <text:line-break/>Поддержка:</text:span></text:p>
      <text:list xml:id="list2550400721224777144" text:style-name="L15">
        <text:list-item>
          <text:p text:style-name="P65">текстовых PDF </text:p>
        </text:list-item>
        <text:list-item>
          <text:p text:style-name="P11">многостраничных PDF </text:p>
        </text:list-item>
      </text:list>
      <text:p text:style-name="P6"><text:span text:style-name="T1">Распознавание из Excel</text:span></text:p>
      <text:p text:style-name="P6">Поддержка:</text:p>
      <text:list xml:id="list40825618" text:continue-numbering="true" text:style-name="L15">
        <text:list-item>
          <text:p text:style-name="P60">таблицы Excel</text:p>
        </text:list-item>
      </text:list>
      <text:p text:style-name="P4"/>
      <text:p text:style-name="P6">Автоопределение ингредиентов<text:line-break/>Пример:</text:p>
      <text:section text:style-name="Sect1" text:name="code-block-viewer">
        <text:p text:style-name="Preformatted_20_Text"><text:span text:style-name="Source_20_Text"><text:span text:style-name="T3">Мука 250</text:span></text:span></text:p>
        <text:p text:style-name="Preformatted_20_Text"><text:span text:style-name="Source_20_Text"><text:span text:style-name="T3">Сахар 150</text:span></text:span></text:p>
        <text:p text:style-name="P77"><text:span text:style-name="Source_20_Text"><text:span text:style-name="T3">Яйцо 3</text:span></text:span></text:p>
      </text:section>
      <text:p text:style-name="P6">→ автоматически добавляется в таблицу.</text:p>
      <text:p text:style-name="P6">Автозаполнение технологии приготовления<text:line-break/>По ключевым словам:</text:p>
      <text:list xml:id="list6903450900751911744" text:style-name="L16">
        <text:list-item>
          <text:p text:style-name="P66">взбить </text:p>
        </text:list-item>
        <text:list-item>
          <text:p text:style-name="P66">выпекать </text:p>
        </text:list-item>
        <text:list-item>
          <text:p text:style-name="P66">охладить </text:p>
        </text:list-item>
        <text:list-item>
          <text:p text:style-name="P66">проварить </text:p>
        </text:list-item>
        <text:list-item>
          <text:p text:style-name="P12">стабилизировать </text:p>
        </text:list-item>
      </text:list>
      <text:p text:style-name="P6">→ автоматически раскладывает по блокам.</text:p>
      <text:p text:style-name="P4"><text:soft-page-break/>Для пересчета ингредиентов из расчета базового рецепта на необходимую массу возьми за основу расчет из таблицы (проанализируй листы 1,2,3,4,5,6, сопоставь с листом Технология), а именно сопоставь вес начального объема строка первый расчет на форму диаметром(значение ячейки R1) и в перерасчете на форму диаметром(значение ячейки R2), исходя из значения ячейки I1 листа Технология.</text:p>
      <text:p text:style-name="P4">Пример:</text:p>
      <text:p text:style-name="P4">Граммовка ингредиентов в первоначальном рецепте была в сумме 2115 грамм на форму для выпекания диаметром 20 см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0">250</text:p>
          </table:table-cell>
          <table:table-cell table:style-name="Таблица2.A1" office:value-type="string">
            <text:p text:style-name="P76">Желток (17 г от 1 яйца)</text:p>
          </table:table-cell>
        </table:table-row>
        <table:table-row table:style-name="Таблица2.1">
          <table:table-cell table:style-name="Таблица2.A1" office:value-type="string">
            <text:p text:style-name="P76">120</text:p>
          </table:table-cell>
          <table:table-cell table:style-name="Таблица2.A1" office:value-type="string">
            <text:p text:style-name="P76">Сахар песок</text:p>
          </table:table-cell>
        </table:table-row>
        <table:table-row table:style-name="Таблица2.1">
          <table:table-cell table:style-name="Таблица2.A1" office:value-type="string">
            <text:p text:style-name="P76">60</text:p>
          </table:table-cell>
          <table:table-cell table:style-name="Таблица2.A1" office:value-type="string">
            <text:p text:style-name="P76">Масло подсолнечное</text:p>
          </table:table-cell>
        </table:table-row>
        <table:table-row table:style-name="Таблица2.1">
          <table:table-cell table:style-name="Таблица2.A1" office:value-type="string">
            <text:p text:style-name="P76">230</text:p>
          </table:table-cell>
          <table:table-cell table:style-name="Таблица2.A1" office:value-type="string">
            <text:p text:style-name="P76">Мука пшеничная</text:p>
          </table:table-cell>
        </table:table-row>
        <table:table-row table:style-name="Таблица2.1">
          <table:table-cell table:style-name="Таблица2.A1" office:value-type="string">
            <text:p text:style-name="P76">50</text:p>
          </table:table-cell>
          <table:table-cell table:style-name="Таблица2.A1" office:value-type="string">
            <text:p text:style-name="P76">Паста дес. фисташка</text:p>
          </table:table-cell>
        </table:table-row>
        <table:table-row table:style-name="Таблица2.1">
          <table:table-cell table:style-name="Таблица2.A1" office:value-type="string">
            <text:p text:style-name="P76">60</text:p>
          </table:table-cell>
          <table:table-cell table:style-name="Таблица2.A1" office:value-type="string">
            <text:p text:style-name="P76">Кипяток</text:p>
          </table:table-cell>
        </table:table-row>
        <table:table-row table:style-name="Таблица2.1">
          <table:table-cell table:style-name="Таблица2.A1" office:value-type="string">
            <text:p text:style-name="P76">10</text:p>
          </table:table-cell>
          <table:table-cell table:style-name="Таблица2.A1" office:value-type="string">
            <text:p text:style-name="P76">Разрыхлитель</text:p>
          </table:table-cell>
        </table:table-row>
        <table:table-row table:style-name="Таблица2.1">
          <table:table-cell table:style-name="Таблица2.A1" office:value-type="string">
            <text:p text:style-name="P76">1</text:p>
          </table:table-cell>
          <table:table-cell table:style-name="Таблица2.A1" office:value-type="string">
            <text:p text:style-name="P76">Лимонная кислота</text:p>
          </table:table-cell>
        </table:table-row>
        <table:table-row table:style-name="Таблица2.1">
          <table:table-cell table:style-name="Таблица2.A1" office:value-type="string">
            <text:p text:style-name="P76">1</text:p>
          </table:table-cell>
          <table:table-cell table:style-name="Таблица2.A1" office:value-type="string">
            <text:p text:style-name="P76">Соль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0">250</text:p>
          </table:table-cell>
          <table:table-cell table:style-name="Таблица3.A1" office:value-type="string">
            <text:p text:style-name="P72">Малина свежемороженая</text:p>
          </table:table-cell>
        </table:table-row>
        <table:table-row table:style-name="Таблица3.1">
          <table:table-cell table:style-name="Таблица3.A1" office:value-type="string">
            <text:p text:style-name="P76">100</text:p>
          </table:table-cell>
          <table:table-cell table:style-name="Таблица3.A1" office:value-type="string">
            <text:p text:style-name="P76">Сахар песок</text:p>
          </table:table-cell>
        </table:table-row>
        <table:table-row table:style-name="Таблица3.1">
          <table:table-cell table:style-name="Таблица3.A1" office:value-type="string">
            <text:p text:style-name="P76">3</text:p>
          </table:table-cell>
          <table:table-cell table:style-name="Таблица3.A1" office:value-type="string">
            <text:p text:style-name="P76">Агар-Агар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76">500</text:p>
          </table:table-cell>
          <table:table-cell table:style-name="Таблица4.A1" office:value-type="string">
            <text:p text:style-name="P76">Творожный сыр </text:p>
          </table:table-cell>
        </table:table-row>
        <table:table-row table:style-name="Таблица4.1">
          <table:table-cell table:style-name="Таблица4.A1" office:value-type="string">
            <text:p text:style-name="P76">400</text:p>
          </table:table-cell>
          <table:table-cell table:style-name="Таблица4.A1" office:value-type="string">
            <text:p text:style-name="P76"><text:s/>Сливки 33 – 35%</text:p>
          </table:table-cell>
        </table:table-row>
        <table:table-row table:style-name="Таблица4.1">
          <table:table-cell table:style-name="Таблица4.A1" office:value-type="string">
            <text:p text:style-name="P76">90</text:p>
          </table:table-cell>
          <table:table-cell table:style-name="Таблица4.A1" office:value-type="string">
            <text:p text:style-name="P76">Сахар песок </text:p>
          </table:table-cell>
        </table:table-row>
        <table:table-row table:style-name="Таблица4.1">
          <table:table-cell table:style-name="Таблица4.A1" office:value-type="string">
            <text:p text:style-name="P76">50</text:p>
          </table:table-cell>
          <table:table-cell table:style-name="Таблица4.A1" office:value-type="string">
            <text:p text:style-name="P76">Паста дес. фисташка </text:p>
          </table:table-cell>
        </table:table-row>
      </table:table>
      <text:p text:style-name="P4"><text:s/>а торт заказали на 3000 грамм, то есть ингредиенты уже будут другого объема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Table_20_Contents">Желток (17 г от 1 яйца)</text:p>
          </table:table-cell>
          <table:table-cell table:style-name="Таблица8.A1" office:value-type="string">
            <text:p text:style-name="P74">355</text:p>
          </table:table-cell>
        </table:table-row>
        <table:table-row table:style-name="Таблица8.1">
          <table:table-cell table:style-name="Таблица8.A1" office:value-type="string">
            <text:p text:style-name="P74">Сахар песок</text:p>
          </table:table-cell>
          <table:table-cell table:style-name="Таблица8.A1" office:value-type="string">
            <text:p text:style-name="P74">170</text:p>
          </table:table-cell>
        </table:table-row>
        <table:table-row table:style-name="Таблица8.1">
          <table:table-cell table:style-name="Таблица8.A1" office:value-type="string">
            <text:p text:style-name="P74">Масло подсолнечное</text:p>
          </table:table-cell>
          <table:table-cell table:style-name="Таблица8.A1" office:value-type="string">
            <text:p text:style-name="P74">85</text:p>
          </table:table-cell>
        </table:table-row>
        <table:table-row table:style-name="Таблица8.1">
          <table:table-cell table:style-name="Таблица8.A1" office:value-type="string">
            <text:p text:style-name="P74">Мука пшеничная</text:p>
          </table:table-cell>
          <table:table-cell table:style-name="Таблица8.A1" office:value-type="string">
            <text:p text:style-name="P74">326</text:p>
          </table:table-cell>
        </table:table-row>
        <table:table-row table:style-name="Таблица8.1">
          <table:table-cell table:style-name="Таблица8.A1" office:value-type="string">
            <text:p text:style-name="P74">Паста дес. фисташка</text:p>
          </table:table-cell>
          <table:table-cell table:style-name="Таблица8.A1" office:value-type="string">
            <text:p text:style-name="P74">71</text:p>
          </table:table-cell>
        </table:table-row>
        <table:table-row table:style-name="Таблица8.1">
          <table:table-cell table:style-name="Таблица8.A1" office:value-type="string">
            <text:p text:style-name="P74">Кипяток</text:p>
          </table:table-cell>
          <table:table-cell table:style-name="Таблица8.A1" office:value-type="string">
            <text:p text:style-name="P74">85</text:p>
          </table:table-cell>
        </table:table-row>
        <table:table-row table:style-name="Таблица8.1">
          <table:table-cell table:style-name="Таблица8.A1" office:value-type="string">
            <text:p text:style-name="P74">Разрыхлитель</text:p>
          </table:table-cell>
          <table:table-cell table:style-name="Таблица8.A1" office:value-type="string">
            <text:p text:style-name="P74">14</text:p>
          </table:table-cell>
        </table:table-row>
        <table:table-row table:style-name="Таблица8.1">
          <table:table-cell table:style-name="Таблица8.A1" office:value-type="string">
            <text:p text:style-name="P74">Лимонная кислота</text:p>
          </table:table-cell>
          <table:table-cell table:style-name="Таблица8.A1" office:value-type="string">
            <text:p text:style-name="P74">1</text:p>
          </table:table-cell>
        </table:table-row>
        <table:table-row table:style-name="Таблица8.1">
          <table:table-cell table:style-name="Таблица8.A1" office:value-type="string">
            <text:p text:style-name="P74">Соль</text:p>
          </table:table-cell>
          <table:table-cell table:style-name="Таблица8.A1" office:value-type="string">
            <text:p text:style-name="P74">1</text:p>
          </table:table-cell>
        </table:table-row>
      </table:table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Table_20_Contents">Малина свежемороженая</text:p>
          </table:table-cell>
          <table:table-cell table:style-name="Таблица9.A1" office:value-type="string">
            <text:p text:style-name="P75">355</text:p>
          </table:table-cell>
        </table:table-row>
        <table:table-row table:style-name="Таблица9.2">
          <table:table-cell table:style-name="Таблица9.A1" office:value-type="string">
            <text:p text:style-name="P74">Сахар песок</text:p>
          </table:table-cell>
          <table:table-cell table:style-name="Таблица9.A1" office:value-type="string">
            <text:p text:style-name="P75">142</text:p>
          </table:table-cell>
        </table:table-row>
        <table:table-row table:style-name="Таблица9.2">
          <table:table-cell table:style-name="Таблица9.A1" office:value-type="string">
            <text:p text:style-name="P74">Агар-Агар</text:p>
          </table:table-cell>
          <table:table-cell table:style-name="Таблица9.A1" office:value-type="string">
            <text:p text:style-name="P75">4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Table_20_Contents">Творожный сыр</text:p>
          </table:table-cell>
          <table:table-cell table:style-name="Таблица10.A1" office:value-type="string">
            <text:p text:style-name="P75">709</text:p>
          </table:table-cell>
        </table:table-row>
        <table:table-row table:style-name="Таблица10.1">
          <table:table-cell table:style-name="Таблица10.A1" office:value-type="string">
            <text:p text:style-name="P74">Сливки 33 – 35%</text:p>
          </table:table-cell>
          <table:table-cell table:style-name="Таблица10.A1" office:value-type="string">
            <text:p text:style-name="P75">567</text:p>
          </table:table-cell>
        </table:table-row>
        <table:table-row table:style-name="Таблица10.1">
          <table:table-cell table:style-name="Таблица10.A1" office:value-type="string">
            <text:p text:style-name="P74">Сахар песок</text:p>
          </table:table-cell>
          <table:table-cell table:style-name="Таблица10.A1" office:value-type="string">
            <text:p text:style-name="P75">128</text:p>
          </table:table-cell>
        </table:table-row>
        <table:table-row table:style-name="Таблица10.1">
          <table:table-cell table:style-name="Таблица10.A1" office:value-type="string">
            <text:p text:style-name="P74">Паста дес. фисташка</text:p>
          </table:table-cell>
          <table:table-cell table:style-name="Таблица10.A1" office:value-type="string">
            <text:p text:style-name="P75">71</text:p>
          </table:table-cell>
        </table:table-row>
      </table:table>
      <text:p text:style-name="P4">На форму для выпекания круглую диаметром 28 см или квадратную 26 см.исходя из выше указанных ячеек составь формулу пересчета ингредиентов массы торта на необходимый вес и диаметр формы и круглой и квадратной. Из расчета первичного рецепта на заказной вариант веса. В шапке под наименованием рецепта размести окна для информирования: начальный рецепт вес гр. и форма см. (вес и форма из введенного рецепта первоначального всегда остается потом неизменными), окна для ввода необходимого веса торта(исходя из необходимого веса идет перерасчет ингредиентов и размер формы для выпекания(результат выдается из расчета необходимый вес торта *0,00945626477), окно квадратной формы (результат выдается из расчета необходимый вес торта *0,008558882352), обозначаются вес в граммах, размер в сантиметрах.) Граммы и Сантиметры округлять всегда до целых.</text:p>
      <text:p text:style-name="P6">Общий закупочный лист по всем<text:span text:style-name="T1">у</text:span> рецепт<text:span text:style-name="T1">у. Если совпадают ингредиенты по блокам</text:span>:</text:p>
      <text:list xml:id="list2908886630947414586" text:style-name="L17">
        <text:list-item>
          <text:p text:style-name="P67"><text:soft-page-break/>суммирует одинаковые ингредиенты </text:p>
        </text:list-item>
        <text:list-item>
          <text:p text:style-name="P13">выводит общий объем закупки </text:p>
        </text:list-item>
      </text:list>
      <text:p text:style-name="P6">Улучшенный PDF-экспорт:</text:p>
      <text:list xml:id="list7675522035083954852" text:style-name="L18">
        <text:list-item>
          <text:p text:style-name="P68">таблицы </text:p>
        </text:list-item>
        <text:list-item>
          <text:p text:style-name="P68">технологии </text:p>
        </text:list-item>
        <text:list-item>
          <text:p text:style-name="P68">сборка </text:p>
        </text:list-item>
        <text:list-item>
          <text:p text:style-name="P68">фото рецепта </text:p>
        </text:list-item>
        <text:list-item>
          <text:p text:style-name="P14">финансовый расчет </text:p>
        </text:list-item>
      </text:list>
      <text:p text:style-name="Standard"><text:span text:style-name="T2">OCR для Excel-скринов<text:line-break/>Либо можно грузить скрин таблицы — система попытается распознать.</text:span></text:p>
      <text:p text:style-name="Standard"><text:span text:style-name="T2">С возможностью </text:span><text:span text:style-name="T3">добавление</text:span><text:span text:style-name="T2">я</text:span><text:span text:style-name="T3"> ингридиетов по изготовлению, по массе, по граммам, </text:span><text:span text:style-name="T2">составь</text:span><text:span text:style-name="T3"> </text:span><text:span text:style-name="T2">интерфейс</text:span><text:span text:style-name="T3"> так, что бы каждая из составляющих изделия, была выведена в одну общую табличку, что визуально подсказывает, что входит </text:span><text:span text:style-name="T2">к примеру </text:span><text:span text:style-name="T3">в бисквит, что входит в крем в таблице </text:span><text:span text:style-name="T2">было </text:span><text:span text:style-name="T3">сразу видно</text:span><text:span text:style-name="Strong_20_Emphasis"><text:span text:style-name="T3">:</text:span></text:span></text:p>
      <text:p text:style-name="Standard"><text:span text:style-name="Strong_20_Emphasis"><text:span text:style-name="T3">Категории внутри рецепта:</text:span></text:span></text:p>
      <text:list xml:id="list158181452334047124" text:style-name="L1">
        <text:list-item>
          <text:p text:style-name="P61">Бисквит </text:p>
        </text:list-item>
        <text:list-item>
          <text:p text:style-name="P61">Крем </text:p>
        </text:list-item>
        <text:list-item>
          <text:p text:style-name="P61">Начинка </text:p>
        </text:list-item>
        <text:list-item>
          <text:p text:style-name="P61">Пропитка </text:p>
        </text:list-item>
        <text:list-item>
          <text:p text:style-name="P61">Ганаш </text:p>
        </text:list-item>
        <text:list-item>
          <text:p text:style-name="P61">Декор ( <text:span text:style-name="T1">берется из расчета по формуле из файла) </text:span></text:p>
        </text:list-item>
        <text:list-item>
          <text:p text:style-name="P61">Упаковка </text:p>
        </text:list-item>
        <text:list-item>
          <text:p text:style-name="P7">Доставка </text:p>
        </text:list-item>
      </text:list>
      <text:p text:style-name="Text_20_body"><text:span text:style-name="T3">Теперь в таблице сразу видно, </text:span><text:span text:style-name="Strong_20_Emphasis"><text:span text:style-name="T3">к какой части изделия относится ингредиент</text:span></text:span><text:span text:style-name="T3">.</text:span></text:p>
      <text:p text:style-name="P6"><text:s/>Одна общая большая таблица<text:line-break/>(визуально видно структуру изделия)</text:p>
      <text:p text:style-name="P3"><text:span text:style-name="Strong_20_Emphasis"><text:span text:style-name="T3">Блок «Технология приготовления» для каждой категории</text:span></text:span><text:span text:style-name="T3"><text:line-break/>Теперь у каждого блока есть своё текстовое описание:</text:span></text:p>
      <text:list xml:id="list5153639473193792396" text:style-name="L3">
        <text:list-item>
          <text:p text:style-name="P62">Бисквит → технология приготовления </text:p>
        </text:list-item>
        <text:list-item>
          <text:p text:style-name="P62">Крем → технология приготовления </text:p>
        </text:list-item>
        <text:list-item>
          <text:p text:style-name="P62">Начинка → технология приготовления </text:p>
        </text:list-item>
        <text:list-item>
          <text:p text:style-name="P62">Пропитка → технология приготовления </text:p>
        </text:list-item>
        <text:list-item>
          <text:p text:style-name="P62">Покрытие → технология приготовления </text:p>
        </text:list-item>
        <text:list-item>
          <text:p text:style-name="P8">Декор → технология приготовления </text:p>
        </text:list-item>
      </text:list>
      <text:p text:style-name="Text_20_body"><text:span text:style-name="T3">То есть сразу видно:<text:line-break/></text:span><text:span text:style-name="Strong_20_Emphasis"><text:span text:style-name="T3">ингредиенты + как именно готовить этот блок</text:span></text:span></text:p>
      <text:p text:style-name="Text_20_body"><text:span text:style-name="Strong_20_Emphasis"><text:span text:style-name="T3">Блок «Сборка изделия»</text:span></text:span><text:span text:style-name="T3"><text:line-break/>Находится </text:span><text:span text:style-name="Strong_20_Emphasis"><text:span text:style-name="T3">между таблицей ингредиентов и финансовым расчетом</text:span></text:span></text:p>
      <text:p text:style-name="P3"><text:span text:style-name="Strong_20_Emphasis"><text:span text:style-name="T3">Автоматическая закупка</text:span></text:span><text:span text:style-name="T3"><text:line-break/>— система суммирует одинаковые ингредиенты по всему рецепту<text:line-break/>— выводит общий закупочный лист</text:span></text:p>
      <text:p text:style-name="Text_20_body"><text:span text:style-name="Strong_20_Emphasis"><text:span text:style-name="T3">Экспорт в PDF</text:span></text:span><text:span text:style-name="T3"><text:line-break/>— сохранение техкарты в PDF </text:span><text:span text:style-name="T2">поместить на 1 лист на русском языке</text:span></text:p>
      <text:p text:style-name="Text_20_body"><text:span text:style-name="Strong_20_Emphasis"><text:span text:style-name="T3">Печать техкарты</text:span></text:span><text:span text:style-name="T3"><text:line-break/>— отдельная кнопка печати </text:span><text:span text:style-name="T2">поместить на 1 лист на русском языке</text:span></text:p>
      <text:p text:style-name="Text_20_body"><text:span text:style-name="Strong_20_Emphasis"><text:span text:style-name="T3">Расчет прибыли</text:span></text:span><text:span text:style-name="T3"><text:line-break/>— себестоимость<text:line-break/>— наценка<text:line-break/>— чистая прибыль</text:span></text:p>
      <text:p text:style-name="Text_20_body"><text:span text:style-name="Strong_20_Emphasis"><text:span text:style-name="T3">Учет упаковки и доставки</text:span></text:span><text:span text:style-name="T3"><text:line-break/>— включается в полную себестоимость</text:span></text:p>
      <text:p text:style-name="P6"><text:soft-page-break/><text:span text:style-name="T3"/></text:p>
      <text:p text:style-name="P6">Автоматическая себестоимость</text:p>
      <text:p text:style-name="P6">Автоматический расчет продажной цены</text:p>
      <text:p text:style-name="P6"><text:s/>Расчет прибыли</text:p>
      <text:p text:style-name="P6">Учет упаковки <text:span text:style-name="T1">и инвентаря (минитаблица в которой на выбор добавить 7 позиций из выпадающего списка)</text:span></text:p>
      <text:p text:style-name="P6">Учет доставки (<text:span text:style-name="T1">сумма вводится вручную)</text:span></text:p>
      <text:p text:style-name="P6">Экспорт техкарты в PDF (печать)</text:p>
      <text:p text:style-name="P6">Список закупки</text:p>
      <text:p text:style-name="P4"><text:span text:style-name="T1"/></text:p>
      <text:p text:style-name="P1"><text:s/><text:span text:style-name="T1">П</text:span>олностью русифицированная версия (весь интерфейс, подписи, кнопки, уведомления, техкарта, закупка, <text:span text:style-name="T1">печать</text:span>) категории пиши подробно с документацией, чтобы я могла скопировать его целиком и вставить в онлайн HTML кулинарную книгу калькулятор. </text:p>
      <text:p text:style-name="P1"/>
      <text:p text:style-name="P1"/>
      <text:p text:style-name="P1"/>
      <text:p text:style-name="P2">Промт что выдал на финише <text:span text:style-name="T4">GPT</text:span></text:p>
      <text:p text:style-name="P2"><text:span text:style-name="T4"/></text:p>
      <text:p text:style-name="P4"><text:span text:style-name="T4">Создай одностраничное веб-приложение «Кулинарная книга-калькулятор» на чистом HTML + CSS + JavaScript без backend.</text:span></text:p>
      <text:p text:style-name="Text_20_body">Формат: один HTML-файл со встроенными стилями и JS.</text:p>
      <text:p text:style-name="Text_20_body">Подключить библиотеки:</text:p>
      <text:list xml:id="list7048765856048974260" text:style-name="L19">
        <text:list-item>
          <text:p text:style-name="P15">xlsx.js для импорта Excel</text:p>
        </text:list-item>
        <text:list-item>
          <text:p text:style-name="P15">tesseract.js для OCR таблиц</text:p>
        </text:list-item>
        <text:list-item>
          <text:p text:style-name="P15">pdfmake для PDF</text:p>
        </text:list-item>
      </text:list>
      <text:p text:style-name="Text_20_body">Основная логика приложения:</text:p>
      <text:list xml:id="list123650176099594033" text:style-name="L20">
        <text:list-item>
          <text:p text:style-name="P16">КАРУСЕЛЬ РЕЦЕПТОВ</text:p>
        </text:list-item>
      </text:list>
      <text:list xml:id="list8688445464742300608" text:style-name="L21">
        <text:list-item>
          <text:p text:style-name="P17">отображение всех сохранённых рецептов карточками</text:p>
        </text:list-item>
        <text:list-item>
          <text:p text:style-name="P17">клик по карточке открывает рецепт</text:p>
        </text:list-item>
        <text:list-item>
          <text:p text:style-name="P17">кнопка «Добавить рецепт»</text:p>
        </text:list-item>
      </text:list>
      <text:list xml:id="list5911688817867254258" text:style-name="L22">
        <text:list-item>
          <text:p text:style-name="P18">БАЗА ИНГРЕДИЕНТОВ<text:line-break/>Таблица:</text:p>
        </text:list-item>
      </text:list>
      <text:list xml:id="list8909792935322572884" text:style-name="L23">
        <text:list-item>
          <text:p text:style-name="P19">ингредиент</text:p>
        </text:list-item>
        <text:list-item>
          <text:p text:style-name="P19">цена упаковки</text:p>
        </text:list-item>
        <text:list-item>
          <text:p text:style-name="P19">вес упаковки</text:p>
        </text:list-item>
        <text:list-item>
          <text:p text:style-name="P19">цена за грамм (автоматический расчёт)</text:p>
        </text:list-item>
      </text:list>
      <text:p text:style-name="Text_20_body">Функции:</text:p>
      <text:list xml:id="list2401967175474295031" text:style-name="L24">
        <text:list-item>
          <text:p text:style-name="P20">импорт Excel</text:p>
        </text:list-item>
        <text:list-item>
          <text:p text:style-name="P20">ручное добавление</text:p>
        </text:list-item>
        <text:list-item>
          <text:p text:style-name="P20">удаление</text:p>
        </text:list-item>
        <text:list-item>
          <text:p text:style-name="P20">автосохранение в localStorage</text:p>
        </text:list-item>
        <text:list-item>
          <text:p text:style-name="P20">datalist-подсказки для рецептов</text:p>
        </text:list-item>
      </text:list>
      <text:list xml:id="list113499916842439567" text:style-name="L25">
        <text:list-item>
          <text:p text:style-name="P21">СТРУКТУРА РЕЦЕПТА</text:p>
        </text:list-item>
      </text:list>
      <text:p text:style-name="Text_20_body">Поля:</text:p>
      <text:list xml:id="list667431739794291372" text:style-name="L26">
        <text:list-item>
          <text:p text:style-name="P22"><text:soft-page-break/>название рецепта</text:p>
        </text:list-item>
        <text:list-item>
          <text:p text:style-name="P22">начальный вес (фиксируемый)</text:p>
        </text:list-item>
        <text:list-item>
          <text:p text:style-name="P22">нужный вес</text:p>
        </text:list-item>
        <text:list-item>
          <text:p text:style-name="P22">начальная форма (фиксируемая вручную до сохранения)</text:p>
        </text:list-item>
        <text:list-item>
          <text:p text:style-name="P22">рекомендуемая форма выпечки</text:p>
        </text:list-item>
        <text:list-item>
          <text:p text:style-name="P22">квадратная форма</text:p>
        </text:list-item>
      </text:list>
      <text:p text:style-name="Text_20_body">Фиксация:<text:line-break/>До сохранения:</text:p>
      <text:list xml:id="list2069652008187098005" text:style-name="L27">
        <text:list-item>
          <text:p text:style-name="P23">начальная форма редактируется вручную</text:p>
        </text:list-item>
      </text:list>
      <text:p text:style-name="Text_20_body">После сохранения:</text:p>
      <text:list xml:id="list3104480466733411861" text:style-name="L28">
        <text:list-item>
          <text:p text:style-name="P24">начальная форма блокируется readonly</text:p>
        </text:list-item>
        <text:list-item>
          <text:p text:style-name="P24">начальный вес блокируется readonly</text:p>
        </text:list-item>
      </text:list>
      <text:p text:style-name="Text_20_body">Кнопка «Сохранить рецепт»:<text:line-break/>фиксирует:</text:p>
      <text:list xml:id="list5904036644556970454" text:style-name="L29">
        <text:list-item>
          <text:p text:style-name="P25">initialBaseWeight</text:p>
        </text:list-item>
        <text:list-item>
          <text:p text:style-name="P25">initialRoundForm</text:p>
        </text:list-item>
        <text:list-item>
          <text:p text:style-name="P25">locked=true</text:p>
        </text:list-item>
      </text:list>
      <text:list xml:id="list4482919939732983081" text:style-name="L30">
        <text:list-item>
          <text:p text:style-name="P26">ЛОГИКА ПЕРЕСЧЁТА</text:p>
        </text:list-item>
      </text:list>
      <text:p text:style-name="Text_20_body">При изменении нужного веса:<text:line-break/>пересчитывать все ингредиенты пропорционально:</text:p>
      <text:p text:style-name="Text_20_body">новый вес ингредиента =<text:line-break/>базовый вес ингредиента × (нужный вес / начальный вес)</text:p>
      <text:p text:style-name="Text_20_body">Важно:</text:p>
      <text:list xml:id="list4582585863474639768" text:style-name="L31">
        <text:list-item>
          <text:p text:style-name="P27">начальный вес никогда не меняется</text:p>
        </text:list-item>
        <text:list-item>
          <text:p text:style-name="P27">сохраняется только исходный рецепт</text:p>
        </text:list-item>
        <text:list-item>
          <text:p text:style-name="P27">пересчёт не сохраняется как новый базовый</text:p>
        </text:list-item>
      </text:list>
      <text:p text:style-name="Text_20_body">Учитывать:<text:line-break/>НЕ входят в общий вес:</text:p>
      <text:list xml:id="list3609314709038283250" text:style-name="L32">
        <text:list-item>
          <text:p text:style-name="P28">упаковка</text:p>
        </text:list-item>
      </text:list>
      <text:p text:style-name="Text_20_body">Входят:</text:p>
      <text:list xml:id="list3604354290815410788" text:style-name="L33">
        <text:list-item>
          <text:p text:style-name="P29">ганаш</text:p>
        </text:list-item>
        <text:list-item>
          <text:p text:style-name="P29">декор</text:p>
        </text:list-item>
      </text:list>
      <text:list xml:id="list3480359008201923168" text:style-name="L34">
        <text:list-item>
          <text:p text:style-name="P30">РАСЧЁТ ФОРМЫ</text:p>
        </text:list-item>
      </text:list>
      <text:p text:style-name="Text_20_body">Формула:</text:p>
      <text:p text:style-name="Text_20_body">новая форма =<text:line-break/>начальная форма × sqrt(нужный вес / начальный вес) + 1 см</text:p>
      <text:p text:style-name="Text_20_body">Округление:<text:line-break/>Math.round()</text:p>
      <text:p text:style-name="Text_20_body">Важно:<text:line-break/>начальная форма фиксируется только вручную и только после сохранения.</text:p>
      <text:list xml:id="list2295238434673927810" text:style-name="L35">
        <text:list-item>
          <text:p text:style-name="P31">КАТЕГОРИИ РЕЦЕПТА</text:p>
        </text:list-item>
      </text:list>
      <text:p text:style-name="Text_20_body">Категории:</text:p>
      <text:list xml:id="list5107881142788625694" text:style-name="L36">
        <text:list-item>
          <text:p text:style-name="P32"><text:soft-page-break/>Бисквит</text:p>
        </text:list-item>
        <text:list-item>
          <text:p text:style-name="P32">Крем</text:p>
        </text:list-item>
        <text:list-item>
          <text:p text:style-name="P32">Начинка</text:p>
        </text:list-item>
        <text:list-item>
          <text:p text:style-name="P32">Пропитка</text:p>
        </text:list-item>
        <text:list-item>
          <text:p text:style-name="P32">Ганаш</text:p>
        </text:list-item>
        <text:list-item>
          <text:p text:style-name="P32">Декор</text:p>
        </text:list-item>
        <text:list-item>
          <text:p text:style-name="P32">Упаковка</text:p>
        </text:list-item>
      </text:list>
      <text:p text:style-name="Text_20_body">Убрать категорию «Доставка» из рецептуры.</text:p>
      <text:p text:style-name="Text_20_body">Категория Упаковка:</text:p>
      <text:list xml:id="list8494181034766309816" text:style-name="L37">
        <text:list-item>
          <text:p text:style-name="P33">измеряется в штуках</text:p>
        </text:list-item>
        <text:list-item>
          <text:p text:style-name="P33">не в граммах</text:p>
        </text:list-item>
        <text:list-item>
          <text:p text:style-name="P33">входит в себестоимость</text:p>
        </text:list-item>
        <text:list-item>
          <text:p text:style-name="P33">не входит в общий вес</text:p>
        </text:list-item>
      </text:list>
      <text:list xml:id="list451266168580891769" text:style-name="L38">
        <text:list-item>
          <text:p text:style-name="P34">РАСКРЫВАЮЩИЕСЯ БЛОКИ</text:p>
        </text:list-item>
      </text:list>
      <text:p text:style-name="Text_20_body">Каждая категория — отдельный collapsible details-блок.</text:p>
      <text:p text:style-name="Text_20_body">Поведение:</text:p>
      <text:list xml:id="list1239279510386216140" text:style-name="L39">
        <text:list-item>
          <text:p text:style-name="P35">открывается только выбранная категория</text:p>
        </text:list-item>
        <text:list-item>
          <text:p text:style-name="P35">остальные не раскрываются автоматически</text:p>
        </text:list-item>
        <text:list-item>
          <text:p text:style-name="P35">состояние хранится в lastOpenedCategory</text:p>
        </text:list-item>
      </text:list>
      <text:p text:style-name="Text_20_body">Добавить:</text:p>
      <text:list xml:id="list6964191927501350865" text:style-name="L40">
        <text:list-item>
          <text:p text:style-name="P36">свернуть все</text:p>
        </text:list-item>
        <text:list-item>
          <text:p text:style-name="P36">развернуть все</text:p>
        </text:list-item>
      </text:list>
      <text:p text:style-name="Text_20_body">При добавлении ингредиента:<text:line-break/>открывать только блок «Упаковка»</text:p>
      <text:list xml:id="list8289793389673342765" text:style-name="L41">
        <text:list-item>
          <text:p text:style-name="P37">ИМПОРТ РЕЦЕПТА ИЗ EXCEL</text:p>
        </text:list-item>
      </text:list>
      <text:p text:style-name="Text_20_body">Структура Excel:</text:p>
      <text:p text:style-name="Text_20_body">Колонка A = категория<text:line-break/>Колонка B = ингредиент<text:line-break/>Колонка C = вес<text:line-break/>Колонка D = технология</text:p>
      <text:p text:style-name="Text_20_body">Логика:<text:line-break/>если строка содержит только категорию:<text:line-break/>запоминаем категорию</text:p>
      <text:p text:style-name="Text_20_body">следующие строки без категории:<text:line-break/>наследуют последнюю категорию</text:p>
      <text:p text:style-name="Text_20_body">если в колонке D есть текст:<text:line-break/>это технология категории</text:p>
      <text:p text:style-name="Text_20_body">автоматически помещать в поле технологии соответствующего блока</text:p>
      <text:list xml:id="list6517328399103505618" text:style-name="L42">
        <text:list-item>
          <text:p text:style-name="P38">ТЕХНОЛОГИЯ</text:p>
        </text:list-item>
      </text:list>
      <text:p text:style-name="Text_20_body">У каждой категории:<text:line-break/>отдельное textarea поле:<text:line-break/>«Технология»</text:p>
      <text:p text:style-name="Text_20_body">Сохранять в:<text:line-break/>recipe.technology[category]</text:p>
      <text:list xml:id="list7363751259746211404" text:style-name="L43">
        <text:list-item>
          <text:p text:style-name="P39"><text:soft-page-break/>ТЕХНИЧЕСКИЕ ЗАМЕТКИ</text:p>
        </text:list-item>
      </text:list>
      <text:p text:style-name="Text_20_body">Отдельное поле notes</text:p>
      <text:list xml:id="list8962848162709560946" text:style-name="L44">
        <text:list-item>
          <text:p text:style-name="P40">ДОБАВЛЕНИЕ ИНГРЕДИЕНТОВ</text:p>
        </text:list-item>
      </text:list>
      <text:p text:style-name="Text_20_body">Кнопка:<text:line-break/>«Добавить ингредиент»</text:p>
      <text:p text:style-name="Text_20_body">Добавляет по умолчанию:<text:line-break/>категория = Упаковка<text:line-break/>вес = 1<text:line-break/>единица = шт</text:p>
      <text:list xml:id="list3260516233634552271" text:style-name="L45">
        <text:list-item>
          <text:p text:style-name="P41">ФИНАНСОВЫЙ БЛОК</text:p>
        </text:list-item>
      </text:list>
      <text:p text:style-name="Text_20_body">Отдельный визуальный блок между рецептурой и печатью.</text:p>
      <text:p text:style-name="Text_20_body">Поля:</text:p>
      <text:list xml:id="list3111570086184963699" text:style-name="L46">
        <text:list-item>
          <text:p text:style-name="P42">себестоимость</text:p>
        </text:list-item>
        <text:list-item>
          <text:p text:style-name="P42">цена продажи</text:p>
        </text:list-item>
        <text:list-item>
          <text:p text:style-name="P42">доставка (ручной ввод суммы)</text:p>
        </text:list-item>
        <text:list-item>
          <text:p text:style-name="P42">наценка</text:p>
        </text:list-item>
        <text:list-item>
          <text:p text:style-name="P42">чистая прибыль</text:p>
        </text:list-item>
      </text:list>
      <text:p text:style-name="Text_20_body">Формулы:</text:p>
      <text:p text:style-name="Text_20_body">Себестоимость:<text:line-break/>сумма всех ингредиентов по базе</text:p>
      <text:p text:style-name="Text_20_body">Наценка:<text:line-break/>((цена продажи - себестоимость) / себестоимость) * 100</text:p>
      <text:p text:style-name="Text_20_body">Чистая прибыль:<text:line-break/>цена продажи - себестоимость - доставка</text:p>
      <text:list xml:id="list2378270288102073763" text:style-name="L47">
        <text:list-item>
          <text:p text:style-name="P43">ОТДЕЛЬНАЯ ФОРМА СЕБЕСТОИМОСТИ</text:p>
        </text:list-item>
      </text:list>
      <text:p text:style-name="Text_20_body">Кнопка:<text:line-break/>«Сформировать себестоимость»</text:p>
      <text:p text:style-name="Text_20_body">Печатная таблица:</text:p>
      <text:p text:style-name="Text_20_body">Ингредиент | Себестоимость | Цена продажи (распределённая пропорционально)</text:p>
      <text:list xml:id="list849849418583893686" text:style-name="L48">
        <text:list-item>
          <text:p text:style-name="P44">ПЕЧАТЬ</text:p>
        </text:list-item>
      </text:list>
      <text:p text:style-name="Text_20_body">Кнопки внизу формы:</text:p>
      <text:list xml:id="list6944747393236914721" text:style-name="L49">
        <text:list-item>
          <text:p text:style-name="P45">Печать закупки</text:p>
        </text:list-item>
        <text:list-item>
          <text:p text:style-name="P45">Печать техкарты</text:p>
        </text:list-item>
        <text:list-item>
          <text:p text:style-name="P45">Сохранить PDF</text:p>
        </text:list-item>
        <text:list-item>
          <text:p text:style-name="P45">Печать себестоимости</text:p>
        </text:list-item>
      </text:list>
      <text:list xml:id="list3079612487423260673" text:style-name="L50">
        <text:list-item>
          <text:p text:style-name="P46">ЗАКУПОЧНЫЙ ЛИСТ</text:p>
        </text:list-item>
      </text:list>
      <text:p text:style-name="Text_20_body">Логика:<text:line-break/>одинаковые ингредиенты суммировать</text:p>
      <text:p text:style-name="Text_20_body">Формат:<text:line-break/>Ингредиент — общий вес</text:p>
      <text:list xml:id="list7616058608532928052" text:style-name="L51">
        <text:list-item>
          <text:p text:style-name="P47">ТЕХКАРТА</text:p>
        </text:list-item>
      </text:list>
      <text:p text:style-name="Text_20_body">Заголовок:</text:p>
      <text:p text:style-name="Text_20_body">Название рецепта<text:line-break/>ТЕХНОЛОГИЧЕСКАЯ КАРТА</text:p>
      <text:p text:style-name="Text_20_body"><text:soft-page-break/>Под заголовком:</text:p>
      <text:list xml:id="list1282754990139069161" text:style-name="L52">
        <text:list-item>
          <text:p text:style-name="P48">нужный вес</text:p>
        </text:list-item>
        <text:list-item>
          <text:p text:style-name="P48">рекомендуемая форма</text:p>
        </text:list-item>
      </text:list>
      <text:p text:style-name="Text_20_body">Далее:<text:line-break/>категории<text:line-break/>ингредиенты<text:line-break/>технологии<text:line-break/>примечания</text:p>
      <text:list xml:id="list7804729198206632877" text:style-name="L53">
        <text:list-item>
          <text:p text:style-name="P49">PDF</text:p>
        </text:list-item>
      </text:list>
      <text:p text:style-name="Text_20_body">Сохранять техкарту в PDF</text:p>
      <text:p text:style-name="Text_20_body">Требования:</text:p>
      <text:list xml:id="list8787702813189029056" text:style-name="L54">
        <text:list-item>
          <text:p text:style-name="P50">читаемый</text:p>
        </text:list-item>
        <text:list-item>
          <text:p text:style-name="P50">корректная вёрстка</text:p>
        </text:list-item>
        <text:list-item>
          <text:p text:style-name="P50">Times New Roman</text:p>
        </text:list-item>
        <text:list-item>
          <text:p text:style-name="P50">межстрочный интервал 1.3</text:p>
        </text:list-item>
        <text:list-item>
          <text:p text:style-name="P50">компактно</text:p>
        </text:list-item>
        <text:list-item>
          <text:p text:style-name="P50">помещается максимум на 1 страницу</text:p>
        </text:list-item>
      </text:list>
      <text:list xml:id="list467307988598427150" text:style-name="L55">
        <text:list-item>
          <text:p text:style-name="P51">ВСЕ ПЕЧАТНЫЕ ФОРМЫ</text:p>
        </text:list-item>
      </text:list>
      <text:p text:style-name="Text_20_body">Требования:</text:p>
      <text:list xml:id="list3903726407729125104" text:style-name="L56">
        <text:list-item>
          <text:p text:style-name="P52">Times New Roman</text:p>
        </text:list-item>
        <text:list-item>
          <text:p text:style-name="P52">line-height 1.3</text:p>
        </text:list-item>
        <text:list-item>
          <text:p text:style-name="P52">убрать интервалы между абзацами</text:p>
        </text:list-item>
        <text:list-item>
          <text:p text:style-name="P52">компактная печать</text:p>
        </text:list-item>
        <text:list-item>
          <text:p text:style-name="P52">отступы только у заголовков</text:p>
        </text:list-item>
      </text:list>
      <text:list xml:id="list6203381588501692164" text:style-name="L57">
        <text:list-item>
          <text:p text:style-name="P53">КНОПКИ</text:p>
        </text:list-item>
      </text:list>
      <text:p text:style-name="Text_20_body">Первый ряд:</text:p>
      <text:list xml:id="list5259097890483138048" text:style-name="L58">
        <text:list-item>
          <text:p text:style-name="P54">Сохранить рецепт</text:p>
        </text:list-item>
        <text:list-item>
          <text:p text:style-name="P54">Редактировать рецепт</text:p>
        </text:list-item>
        <text:list-item>
          <text:p text:style-name="P54">Удалить рецепт</text:p>
        </text:list-item>
      </text:list>
      <text:p text:style-name="Text_20_body">Второй ряд:</text:p>
      <text:list xml:id="list5088393044072935937" text:style-name="L59">
        <text:list-item>
          <text:p text:style-name="P55">Свернуть все</text:p>
        </text:list-item>
        <text:list-item>
          <text:p text:style-name="P55">Развернуть все</text:p>
        </text:list-item>
      </text:list>
      <text:p text:style-name="Text_20_body">Третий ряд (внизу):</text:p>
      <text:list xml:id="list240922756717602837" text:style-name="L60">
        <text:list-item>
          <text:p text:style-name="P56">Печать закупки</text:p>
        </text:list-item>
        <text:list-item>
          <text:p text:style-name="P56">Печать техкарты</text:p>
        </text:list-item>
        <text:list-item>
          <text:p text:style-name="P56">Сохранить PDF</text:p>
        </text:list-item>
        <text:list-item>
          <text:p text:style-name="P56">Печать себестоимости</text:p>
        </text:list-item>
      </text:list>
      <text:list xml:id="list2078869117629917439" text:style-name="L61">
        <text:list-item>
          <text:p text:style-name="P57">ХРАНЕНИЕ</text:p>
        </text:list-item>
      </text:list>
      <text:p text:style-name="Text_20_body">Использовать localStorage:</text:p>
      <text:list xml:id="list7525344421410654497" text:style-name="L62">
        <text:list-item>
          <text:p text:style-name="P58">recipes</text:p>
        </text:list-item>
        <text:list-item>
          <text:p text:style-name="P58">ingredientBase</text:p>
        </text:list-item>
      </text:list>
      <text:p text:style-name="Text_20_body"><text:soft-page-break/>Важно:</text:p>
      <text:list xml:id="list2270721973824633132" text:style-name="L63">
        <text:list-item>
          <text:p text:style-name="P59">код должен быть полностью рабочим</text:p>
        </text:list-item>
        <text:list-item>
          <text:p text:style-name="P59">без синтаксических ошибок</text:p>
        </text:list-item>
        <text:list-item>
          <text:p text:style-name="P59">без незакрытых строк</text:p>
        </text:list-item>
        <text:list-item>
          <text:p text:style-name="P59">без сломанных template strings</text:p>
        </text:list-item>
        <text:list-item>
          <text:p text:style-name="P59">без window.document.write</text:p>
        </text:list-item>
        <text:list-item>
          <text:p text:style-name="P59">использовать createElement вместо document.write</text:p>
        </text:list-item>
        <text:list-item>
          <text:p text:style-name="P59">все функции должны быть завершены</text:p>
        </text:list-item>
        <text:list-item>
          <text:p text:style-name="P59">все кавычки сбалансированы</text:p>
        </text:list-item>
        <text:list-item>
          <text:p text:style-name="P59">весь проект в одном HTML-файле</text:p>
        </text:list-item>
      </text:list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344cm" fo:margin-bottom="0.4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1M12S</meta:editing-duration>
    <meta:editing-cycles>4</meta:editing-cycles>
    <meta:generator>OpenOffice/4.1.15$Win32 OpenOffice.org_project/4115m2$Build-9813</meta:generator>
    <dc:date>2026-05-04T20:53:55.29</dc:date>
    <meta:document-statistic meta:table-count="7" meta:image-count="0" meta:object-count="0" meta:page-count="9" meta:paragraph-count="321" meta:word-count="1542" meta:character-count="10315"/>
    <meta:user-defined meta:name="Info 1"/>
    <meta:user-defined meta:name="Info 2"/>
    <meta:user-defined meta:name="Info 3"/>
    <meta:user-defined meta:name="Info 4"/>
  </office:meta>
</office:document-meta>
</file>