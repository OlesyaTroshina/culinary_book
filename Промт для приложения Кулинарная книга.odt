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language="en" fo:country="US" fo:font-weight="normal" style:font-size-asian="16pt" style:font-weight-asian="normal" style:font-size-complex="16pt" style:font-weight-complex="normal"/>
    </style:style>
    <style:style style:name="P2" style:family="paragraph" style:parent-style-name="Standard">
      <style:text-properties fo:font-size="16pt" fo:language="en" fo:country="US" fo:font-weight="normal" style:font-size-asian="16pt" style:font-weight-asian="normal" style:font-size-complex="16pt" style:font-weight-complex="normal"/>
    </style:style>
    <style:style style:name="T1"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Ты — senior frontend-разработчик, UI/UX-интегратор, архитектор vanilla JavaScript-приложений, специалист по локальным HTML-приложениям, Excel-импорту, pdfmake-печати, расчетным калькуляторам, кондитерскому производству и premium pastry UI. Нужно создать или восстановить приложение: «Кулинарная книга-калькулятор» Это локальное браузерное приложение для кондитера, которое хранит рецепты, базу ингредиентов, пересчитывает рецептуры по нужному весу, считает себестоимость, закупку, печатает технологическую карту, печатает закупку, печатает себестоимость, сохраняет красивый PDF-рецепт, работает с фото рецепта, связанными ингредиентами и premium-иконками категорий. ==================================================== БАЗОВАЯ ВЕРСИЯ И ПРИНЦИП РАБОТЫ ==================================================== Если передан существующий файл приложения, работать строго поверх последней рабочей версии: culinary_book_v7_24_84_compact_category_icons Эта версия считается удачной визуальной версией по иконкам категорий: — иконки подключены; — иконки соответствуют категориям; — строки категорий компактные; — иконки достаточно крупные; — пустые прозрачные края иконок визуально обрезаются; — расчеты и печатные формы не менялись. Если нужно создать новую версию, назвать ее следующим порядковым номером: v7_24_85 или следующим актуальным номером, если версия уже выше. Запрещено откатываться к старым версиям, упрощенным макетам или canvas-прототипам. Особенно нельзя возвращаться к старым версиям до рабочей логики связанных ингредиентов и до версии с корректной закупкой. ==================================================== ФИНАЛЬНЫЙ ФОРМАТ ВЫДАЧИ ==================================================== Выдать приложение в двух файлах: 1. index.html 2. style.css Файл index.html содержит: — HTML-разметку; — подключение библиотек; — подключение style.css; — JavaScript-логику приложения внутри &lt;script&gt;, если отдельный JS-файл не запрошен. Файл style.css содержит: — все стили приложения; — стили тем; — стили кнопок; — стили таблиц; — стили модальных окон; — стили печатных превью, если они относятся к экранному интерфейсу; — стили иконок категорий. В index.html подключить CSS так: &lt;link rel="stylesheet" href="style.css"&gt; Допускается структура: /index.html /style.css /assets/icons/ /assets/media/ Если приложение создается в одном HTML для теста, потом обязательно разделить на HTML + CSS. ==================================================== </text:span><text:soft-page-break/><text:span text:style-name="T1">ВНЕШНИЕ БИБЛИОТЕКИ ==================================================== Использовать только простые CDN-библиотеки. Разрешены: xlsx: https://cdn.jsdelivr.net/npm/xlsx/dist/xlsx.full.min.js pdfmake: https://cdnjs.cloudflare.com/ajax/libs/pdfmake/0.2.7/pdfmake.min.js https://cdnjs.cloudflare.com/ajax/libs/pdfmake/0.2.7/vfs_fonts.js Не использовать: — React; — Vue; — Angular; — backend; — Node.js; — npm-сборку; — серверную базу данных; — тяжелые UI-фреймворки; — внешние платные API; — OCR, если это явно не запрошено. Приложение должно открываться обычным двойным кликом по index.html. ==================================================== КРИТИЧЕСКИЕ ОГРАНИЧЕНИЯ ==================================================== Нельзя менять без прямого запроса: — расчетную архитектуру; — формулы себестоимости; — логику пересчета веса; — логику связанных ингредиентов; — импорт Excel; — печать техкарты; — печать закупки; — печать себестоимости; — красивый PDF-рецепт; — структуру сохранения рецептов; — структуру базы ингредиентов; — локальное хранение; — базовые категории; — принцип сохранения исходной рецептуры. Визуальные доработки не должны менять расчет. Иконки, фон, кнопки, CSS, карточки, отступы, тени и темы не должны влиять на: — себестоимость; — закупку; — связанные ингредиенты; — техкарту; — импорт; — сохранение рецепта; — печать. ==================================================== ОБЩАЯ АРХИТЕКТУРА ==================================================== Приложение должно быть модульным внутри одного JavaScript-кода. Основные модули: 1. State / localStorage 2. База ингредиентов 3. Рецепты 4. Редактор рецепта 5. Категории 6. Иконки категорий 7. Пересчет веса 8. Себестоимость 9. Связанные ингредиенты 10. Импорт Excel 11. Закупка 12. Техкарта 13. Себестоимость для печати 14. Красивый PDF-рецепт 15. Фото и оформление рецепта 16. Настройки темы 17. Настройки логотипа 18. Уведомления toast 19. Модальные окна 20. Проверки и валидация ==================================================== LOCALSTORAGE ==================================================== Все данные хранить локально в браузере. Рекомендуемые ключи: culinaryRecipes culinaryIngredientBase culinarySettings culinaryCurrentRecipeId culinaryThemeSettings culinaryPrintSettings Функции: loadState() saveState() loadRecipes() saveRecipes() loadIngredientBase() saveIngredientBase() loadSettings() saveSettings() </text:span><text:soft-page-break/><text:span text:style-name="T1">Данные должны восстанавливаться после перезагрузки страницы. Нельзя терять рецепты, базу ингредиентов, цены, связанные ингредиенты, фото, технологии, сборку и настройки. ==================================================== СТРУКТУРА ИНГРЕДИЕНТА В БАЗЕ ==================================================== Каждая позиция базы ингредиентов: { id: string, name: string, category: string, price: number, packageWeight: number, unit: string, unitPrice: number, updatedAt: string, isLinked: boolean, linkedTo: string | null, relation: { fromQty: number, fromUnit: string, toQty: number, toUnit: string } | null, linkedItems: [ { id: string, name: string, qty: number, unit: string } ] } Поля: id — уникальный id. name — название ингредиента или материала. category — категория. price — цена закупочной единицы. packageWeight — вес/количество закупочной единицы. unit — единица: гр, кг, шт, уп, мл и т.д. unitPrice — расчетная цена за единицу. updatedAt — дата последнего обновления цены в формате дд.мм. isLinked — связан ли ингредиент. linkedTo — id базового ингредиента. relation — формула пересчета единиц. linkedItems — производные связанные ингредиенты. Формула: unitPrice = price / packageWeight Округлить unitPrice до 3 знаков после запятой. Если price или packageWeight отсутствуют, unitPrice = 0. ==================================================== БАЗА ИНГРЕДИЕНТОВ ==================================================== База ингредиентов должна быть отдельным раскрывающимся блоком. Кнопка/заголовок: — «Открыть базу ингредиентов» — «Закрыть базу ингредиентов» Таблица базы: — Ингредиент / материал — Категория — Цена — Вес упаковки — Единица — Цена за грамм / цена за единицу — Дата цены — Действия Функции: — добавить ингредиент; — редактировать ингредиент; — удалить ингредиент; — импортировать базу из Excel; — искать по базе; — подсвечивать обновленную цену; — защищать от дублей; — работать со связанными ингредиентами. ---------------------------------------------------- Поиск по базе ---------------------------------------------------- Поиск по базе должен работать ТОЛЬКО по названию ингредиента/material name. Искать только в поле: name Не искать по: — цене; — категории; — единице; — весу упаковки; — дате обновления; — служебным полям. При клике в другое поле или уходе из поиска: — поиск очищается; — список возвращается к полному алфавитному виду. Отдельная кнопка «Сбросить поиск» не нужна. ---------------------------------------------------- Алфавитная сортировка ---------------------------------------------------- Базу ингредиентов отображать по алфавиту. Сортировка по name. ---------------------------------------------------- Добавление ингредиента ---------------------------------------------------- Добавление через модальное </text:span><text:soft-page-break/><text:span text:style-name="T1">окно. Поля модального окна: — Название; — Категория; — Цена; — Вес упаковки; — Единица; — Чекбокс «Связанный ингредиент»; — Блок связей, если чекбокс включен. Кнопки: — «Добавить» — «Добавить еще» — «Отмена» Если редактируется существующая позиция, кнопка может быть: — «Сохранить» ---------------------------------------------------- Подсказки похожих позиций ---------------------------------------------------- При вводе первых 2–3 букв названия показывать похожие позиции из базы. Искать только по name. Если пользователь выбирает существующую позицию из подсказок: — открыть режим редактирования этой позиции; — позволить изменить цену, вес, единицу, категорию, связи. Если нужной позиции нет: — пользователь продолжает добавление новой позиции. ---------------------------------------------------- Защита от дублей ---------------------------------------------------- При добавлении новой позиции проверить похожие позиции. Нормализация: — нижний регистр; — trim; — заменить ё на е; — убрать повторяющиеся пробелы; — убрать лишние спецсимволы по необходимости. Сравнивать только name. Если похожие позиции найдены, показать предупреждение: «Похожие позиции уже есть в базе» Обязательно вывести конкретные совпадения: — Мука пшеничная — Мука пшеничная высший сорт Нельзя показывать только абстрактное сообщение без списка. ---------------------------------------------------- Обновление цены ---------------------------------------------------- При изменении price: 1. Пересчитать unitPrice. 2. Записать updatedAt в формате дд.мм. 3. Показать рядом статус: «Цена с дд.мм» 4. Временно подсветить строку. 5. Временно подсветить ячейку цены. Подсветка должна быть мягкой, не агрессивной. ==================================================== СВЯЗАННЫЕ ИНГРЕДИЕНТЫ ==================================================== Связанные ингредиенты — критически важная рабочая логика. Не ломать. Используются для ситуаций, когда одна закупочная единица раскладывается на производственные части. Пример: Яйцо 1 шт = 51 гр Из него: — Белок 34 гр — Желток 17 гр Или: Яйцо (шт) = Яйцо гр 51 г = Белок 34 г + Желток 17 г ---------------------------------------------------- Интерфейс связей ---------------------------------------------------- В модальном окне ингредиента есть чекбокс: «Связанный ингредиент» Если включен: — появляется блок связей; — поле цены для производного ингредиента скрывается или блокируется; — стоимость считается от базового ингредиента; — можно выбрать базовый ингредиент; — можно настроить формулу пересчета; — можно добавить несколько связанных производных ингредиентов. Кнопка: «Еще ингредиент» ---------------------------------------------------- Формула пересчета </text:span><text:soft-page-break/><text:span text:style-name="T1">---------------------------------------------------- Показать визуальную формулу: [количество] [единица] = [количество] [единица] Например: 1 шт = 51 гр Интерфейс должен показывать направление перевода: шт → гр уп → гр шт → шт мл → гр ---------------------------------------------------- Стоимость связанных ингредиентов ---------------------------------------------------- У производного ингредиента цена не вводится вручную. Стоимость производного ингредиента считается от базовой закупочной позиции. Пример: Яйцо стоит 20 руб / 1 шт. 1 шт яйца = 51 гр. Белок = 34 гр. Желток = 17 гр. Стоимость 1 гр яйца: 20 / 51 Стоимость белка: количество белка в рецепте * стоимость 1 гр яйца Но в закупке нужно понимать, сколько целых базовых единиц нужно купить. Если рецепт использует белок 340 гр: 340 / 34 = 10 яиц В закупке должна появиться базовая позиция: Яйцо — 10 шт В столбце «Из расчета» показать: Белок 340 гр от 10 шт яйца Для желтка аналогично. Если используются и белок, и желток, закупка должна корректно агрегировать базовую позицию, а не создавать хаос. ---------------------------------------------------- Правила для связанных ингредиентов ---------------------------------------------------- Связанные ингредиенты должны: — сохраняться в localStorage; — восстанавливаться после перезагрузки; — блокировать ручную цену у производной позиции; — корректно считать себестоимость; — корректно попадать в закупку; — корректно пересчитываться при изменении нужного веса; — не ломать обычные ингредиенты; — не дублировать закупочные позиции; — показывать понятный «Из расчета». ==================================================== СТРУКТУРА РЕЦЕПТА ==================================================== Каждый рецепт: { id: string, title: string, client: string, phone: string, dateTime: string, desiredWeight: number, initialBaseWeight: number, roundForm: number, squareForm: number, notes: string, designNotes: string, assembly: string, salePrice: number, deliveryCost: number, packagingCost: number, ingredients: array, technologies: object, photo: object, printSettings: object, createdAt: string, updatedAt: string } Ингредиент рецепта: { id: string, category: string, name: string, baseAmount: number, amount: number, unit: string, ingredientId: string | null, isLinkedDerived: boolean } Важно: baseAmount — исходное количество в базовой рецептуре. amount — текущее отображаемое количество после пересчета. При сохранении рецепта нельзя заменять baseAmount пересчитанным amount. Иначе рецепт испортится после нескольких пересчетов. ==================================================== ФИНАЛЬНАЯ СТРУКТУРА КАТЕГОРИЙ </text:span><text:soft-page-break/><text:span text:style-name="T1">==================================================== Категории должны быть именно такими. ---------------------------------------------------- ? МЕДИА И ОФОРМЛЕНИЕ ---------------------------------------------------- Фото и оформление рецепта ---------------------------------------------------- ? ВЫПЕКАЕТСЯ ---------------------------------------------------- Бисквит Шоколадный бисквит Коржи Сабле / Песочное тесто Безе Печенье Макаронс Блинчики Оладьи Вафли Пончики Кексы / Капкейки Эклеры / Заварные Тарт / Тарталетки Слойка Брауни Чизкейк Основа чизкейка Пряники Меренговый рулет Синнабоны / Булочки Круассаны Хлеб / Бриошь ---------------------------------------------------- ? КРЕМОВЫЕ И МУССОВЫЕ ---------------------------------------------------- Крем Мусс Изолирующий крем Ганаш Меренга ---------------------------------------------------- ? НАЧИНКИ И ТЕКСТУРЫ ---------------------------------------------------- Джем Конфи / Компоте Карамель Курд Пралине Кремю Намелака Суфле Чизкейк масса Паста / Крем-паста Хрустящий слой / Кранч Ягодная вставка Ореховая масса ---------------------------------------------------- ❄️ ЗАСТЫВАЕТ ---------------------------------------------------- Зефир Мармелад Желе Глазурь Велюр Гель Заморозка / Вставка ---------------------------------------------------- ? АРОМАТЫ И ЖИДКОСТИ ---------------------------------------------------- Пропитка Отдушка Сиропы Экстракты Алкоголь Красители Кандурин / Блёстки ---------------------------------------------------- ? ШОКОЛАД ---------------------------------------------------- Шоколад Конфеты Корпусные изделия Темперирование ---------------------------------------------------- ?￯ﾸﾏ ИНСТРУМЕНТЫ ---------------------------------------------------- Инструменты Не создавать отдельные категории: — Насадки — Формы — Молды — Ацетат — Мешки — Трафареты — Вырубки Они относятся к наполнению категории «Инструменты». ---------------------------------------------------- ? ДЕКОР ---------------------------------------------------- Декор Не создавать отдельные категории: — Ягоды — Посыпки — Изомальт — Сусальное золото — Цветы — Топперы — Шоколадный декор — Безе-декор — Фигурки Они относятся к наполнению категории «Декор». ---------------------------------------------------- ? УПАКОВКА ---------------------------------------------------- Упаковка Не создавать отдельные категории: — Коробки — Подложки — Ленты — Бирки — Расходники — Наклейки Они относятся к наполнению категории «Упаковка». ---------------------------------------------------- ? ДОСТАВКА ---------------------------------------------------- Доставка Доставка учитывается финансово, но не участвует в весе изделия. ==================================================== </text:span><text:soft-page-break/><text:span text:style-name="T1">PREMIUM-ИКОНКИ КАТЕГОРИЙ ==================================================== Иконки уже сгенерированы и согласованы. Ничего генерировать заново не нужно. Использовать готовый комплект PNG. Иконки должны лежать, например: assets/icons/ Каждая иконка: — PNG; — прозрачный фон; — без текста; — без белого фона; — без рамок; — визуально соответствует категории. Создать карту: const categoryIconMap = { "Фото и оформление рецепта": "assets/icons/foto.png", "Бисквит": "assets/icons/biskvit.png", "Шоколадный бисквит": "assets/icons/chocolate-biskvit.png", "Коржи": "assets/icons/korzhi.png", "Сабле / Песочное тесто": "assets/icons/sable.png", "Безе": "assets/icons/beze.png", "Печенье": "assets/icons/cookie.png", "Макаронс": "assets/icons/macarons.png", "Блинчики": "assets/icons/crepes.png", "Оладьи": "assets/icons/pancakes.png", "Вафли": "assets/icons/waffle.png", "Пончики": "assets/icons/donut.png", "Кексы / Капкейки": "assets/icons/cupcake.png", "Эклеры / Заварные": "assets/icons/eclair.png", "Тарт / Тарталетки": "assets/icons/tart.png", "Слойка": "assets/icons/puff.png", "Брауни": "assets/icons/brownie.png", "Чизкейк": "assets/icons/cheesecake.png", "Основа чизкейка": "assets/icons/cheesecake-base.png", "Пряники": "assets/icons/gingerbread.png", "Меренговый рулет": "assets/icons/meringue-roll.png", "Синнабоны / Булочки": "assets/icons/cinnamon-bun.png", "Круассаны": "assets/icons/croissant.png", "Хлеб / Бриошь": "assets/icons/brioche.png", "Крем": "assets/icons/cream.png", "Мусс": "assets/icons/mousse.png", "Изолирующий крем": "assets/icons/isolation-cream.png", "Ганаш": "assets/icons/ganache.png", "Меренга": "assets/icons/meringue.png", "Джем": "assets/icons/jam.png", "Конфи / Компоте": "assets/icons/confit.png", "Карамель": "assets/icons/caramel.png", "Курд": "assets/icons/curd.png", "Пралине": "assets/icons/praline.png", "Кремю": "assets/icons/cremeux.png", "Намелака": "assets/icons/namelaka.png", "Суфле": "assets/icons/souffle.png", "Чизкейк масса": "assets/icons/cheesecake-mass.png", "Паста / Крем-паста": "assets/icons/paste.png", "Хрустящий слой / Кранч": "assets/icons/crunch.png", "Ягодная вставка": "assets/icons/berry-insert.png", "Ореховая масса": "assets/icons/nut-mass.png", "Зефир": "assets/icons/zefir.png", "Мармелад": "assets/icons/marmalade.png", "Желе": "assets/icons/jelly.png", "Глазурь": "assets/icons/glaze.png", "Велюр": "assets/icons/velour.png", "Гель": "assets/icons/gel.png", "Заморозка / Вставка": "assets/icons/frozen-insert.png", "Пропитка": "assets/icons/soak.png", "Отдушка": "assets/icons/fragrance.png", "Сиропы": "assets/icons/syrup.png", "Экстракты": "assets/icons/extracts.png", "Алкоголь": "assets/icons/alcohol.png", </text:span><text:soft-page-break/><text:span text:style-name="T1">"Красители": "assets/icons/colors.png", "Кандурин / Блёстки": "assets/icons/glitter.png", "Шоколад": "assets/icons/chocolate.png", "Конфеты": "assets/icons/candies.png", "Корпусные изделия": "assets/icons/shell-candy.png", "Темперирование": "assets/icons/tempering.png", "Инструменты": "assets/icons/tools.png", "Декор": "assets/icons/decor.png", "Упаковка": "assets/icons/packaging.png", "Доставка": "assets/icons/delivery.png", "default": "assets/icons/default.png" }; ---------------------------------------------------- Особые соответствия иконок ---------------------------------------------------- «Фото и оформление рецепта» — premium camera, не emoji. «Ганаш» — жидкий шоколад / ганаш в чаше, не кусочек торта. «Бисквит» — светлый бисквит. «Шоколадный бисквит» — именно шоколадный бисквит, не торт. «Джем» — баночка джема. «Пропитка» — бутылочка жидкости. «Кандурин / Блёстки» — баночка золотых блесток. «Декор» — цветочный декор / букетик. «Упаковка» — коробка с бантом. «Инструменты» — кондитерские инструменты. «Темперирование» — шоколад в чаше с термометром/лопаткой. ---------------------------------------------------- Нормализация названий для иконок ---------------------------------------------------- Функция должна подбирать иконку не только по точному совпадению, но и по смысловому ключу. function getCategoryIcon(categoryName) { const original = String(categoryName || "").trim(); const name = original.toLowerCase().replaceAll("ё", "е"); if (categoryIconMap[original]) return categoryIconMap[original]; if (name.includes("шоколад") &amp;&amp; name.includes("бисквит")) return categoryIconMap["Шоколадный бисквит"]; if (name.includes("бисквит")) return categoryIconMap["Бисквит"]; if (name.includes("мусс")) return categoryIconMap["Мусс"]; if (name.includes("кремю")) return categoryIconMap["Кремю"]; if (name.includes("крем")) return categoryIconMap["Крем"]; if (name.includes("ганаш")) return categoryIconMap["Ганаш"]; if (name.includes("меренг")) return categoryIconMap["Меренга"]; if (name.includes("джем")) return categoryIconMap["Джем"]; if (name.includes("конфи") || name.includes("компоте")) return categoryIconMap["Конфи / Компоте"]; if (name.includes("карамел")) return categoryIconMap["Карамель"]; if (name.includes("курд")) return categoryIconMap["Курд"]; if (name.includes("пралине")) return categoryIconMap["Пралине"]; if (name.includes("намелака")) return categoryIconMap["Намелака"]; if (name.includes("суфле")) return categoryIconMap["Суфле"]; if (name.includes("паста")) return categoryIconMap["Паста / Крем-паста"]; if (name.includes("кранч") || name.includes("хруст")) return categoryIconMap["Хрустящий слой / Кранч"]; if (name.includes("ягод") || name.includes("вставк")) return </text:span><text:soft-page-break/><text:span text:style-name="T1">categoryIconMap["Ягодная вставка"]; if (name.includes("орех")) return categoryIconMap["Ореховая масса"]; if (name.includes("зефир")) return categoryIconMap["Зефир"]; if (name.includes("мармелад")) return categoryIconMap["Мармелад"]; if (name.includes("желе")) return categoryIconMap["Желе"]; if (name.includes("глазур")) return categoryIconMap["Глазурь"]; if (name.includes("велюр")) return categoryIconMap["Велюр"]; if (name.includes("гель")) return categoryIconMap["Гель"]; if (name.includes("замороз")) return categoryIconMap["Заморозка / Вставка"]; if (name.includes("пропит")) return categoryIconMap["Пропитка"]; if (name.includes("отдуш")) return categoryIconMap["Отдушка"]; if (name.includes("сироп")) return categoryIconMap["Сиропы"]; if (name.includes("экстракт")) return categoryIconMap["Экстракты"]; if (name.includes("алког")) return categoryIconMap["Алкоголь"]; if (name.includes("красител")) return categoryIconMap["Красители"]; if (name.includes("кандурин") || name.includes("блест")) return categoryIconMap["Кандурин / Блёстки"]; if (name.includes("темпер")) return categoryIconMap["Темперирование"]; if (name.includes("шоколад")) return categoryIconMap["Шоколад"]; if (name.includes("конфет")) return categoryIconMap["Конфеты"]; if (name.includes("корпус")) return categoryIconMap["Корпусные изделия"]; if (name.includes("инструмент") || name.includes("насад") || name.includes("форма") || name.includes("молд") || name.includes("ацетат") || name.includes("трафарет") || name.includes("мешок")) return categoryIconMap["Инструменты"]; if (name.includes("декор") || name.includes("посып") || name.includes("топпер") || name.includes("изомальт") || name.includes("золото") || name.includes("цвет")) return categoryIconMap["Декор"]; if (name.includes("упаков") || name.includes("короб") || name.includes("подлож") || name.includes("лент") || name.includes("бирк") || name.includes("наклей")) return categoryIconMap["Упаковка"]; if (name.includes("достав")) return categoryIconMap["Доставка"]; return categoryIconMap["default"] || ""; } ---------------------------------------------------- Компактные иконки в строках категорий ---------------------------------------------------- Иконки должны быть крупными и читаемыми, но не раздувать высоту строк. Пустые прозрачные края PNG можно визуально обрезать через overflow:hidden. Рекомендуемый CSS: .category-icon { width: 50px; height: 50px; min-width: 50px; display: inline-flex; align-items: center; justify-content: center; overflow: hidden; border-radius: 14px; margin-right: 10px; background: transparent; } .category-icon img { width: 64px; height: 64px; object-fit: contain; object-position: center; display: block; } details.group { margin-top: 9px; } details.group &gt; summary { min-height: </text:span><text:soft-page-break/><text:span text:style-name="T1">62px; padding: 7px 18px; display: flex; align-items: center; gap: 10px; } Цель: — строки не огромные; — расстояние между категориями компактное; — иконки заметные; — рисунок иконки помещается; — пустые края обрезаются; — значимая часть иконки не обрезается. ==================================================== РЕДАКТОР РЕЦЕПТА ==================================================== Рецепт отображается в раскрывающихся блоках &lt;details&gt;. Каждая категория: &lt;details class="group"&gt; &lt;summary&gt; &lt;span class="category-icon"&gt;&lt;img ...&gt;&lt;/span&gt; &lt;span&gt;Название категории&lt;/span&gt; &lt;span class="arrow"&gt;∨&lt;/span&gt; &lt;/summary&gt; таблица ингредиентов технология категории &lt;/details&gt; Таблица категории: — Категория — Ингредиент / материал — Количество — Единица — Удалить Под таблицей: textarea «Технология [название категории]» Каждая технология сохраняется отдельно по категории. ==================================================== СБОРКА ==================================================== Сборка — отдельный блок, не категория. Поле: «Сборка» Сборка не должна смешиваться с технологией категории. При импорте Excel колонка/блок «Сборка» должен попадать именно в assembly. В техкарте сборка выводится внизу на всю ширину. ==================================================== ПЕРЕСЧЕТ ВЕСА ==================================================== В рецепте есть: — initialBaseWeight; — desiredWeight; — ratio; — baseAmount; — amount. initialBaseWeight считается один раз как сумма baseAmount всех производственных ингредиентов. Не включать в вес: — Упаковка; — Доставка. Ганаш включать в вес, если он часть изделия. Формула: ratio = desiredWeight / initialBaseWeight amount = baseAmount * ratio Округление количества ингредиентов: — до целых значений; — удобно для кухни. Важно: При сохранении рецепта нельзя перезаписывать baseAmount пересчитанным amount. ==================================================== ФОРМЫ ==================================================== Автоматически считать: Круглая форма: roundForm = desiredWeight * 0.00945626477 Квадратная форма: squareForm = desiredWeight * 0.008558882352 Округлять до целого. Показывать: — Вес; — Круг; — Квадрат. ==================================================== AUTO-GANACHE ==================================================== Если в текущей версии приложения есть автоматическая логика </text:span><text:soft-page-break/><text:span text:style-name="T1">ганаша, ее нужно сохранить. Логика: При расчете ганаша: — удалить старые автоматически созданные строки категории «Ганаш»; — добавить: Темный шоколад = desiredWeight * 0.026 Масло сливочное 82,5% = Темный шоколад / 2 Округлить до целого. Не ломать ручные ингредиенты, если в текущей версии они отделены от авто-ганаша. Если авто-ганаш отключен или не предусмотрен, не навязывать его без запроса. ==================================================== СЕБЕСТОИМОСТЬ ==================================================== Себестоимость считается по ингредиентам рецепта. Для обычного ингредиента: cost = amount * unitPrice unitPrice берется из базы ингредиентов. Для связанного ингредиента: — стоимость считается через базовую закупочную позицию; — ручная цена производного ингредиента не используется. Итоги: productsCost = сумма производственных ингредиентов packagingCost = сумма упаковки deliveryCost = доставка totalCost = productsCost + packagingCost + deliveryCost salePrice = цена продажи profit = salePrice - totalCost markup = salePrice / totalCost Если totalCost = 0: markup = 0 Финансовый блок должен показывать: — Продукты; — Упаковка / Инвентарь; — Доставка; — Всего; — Цена продажи; — Наценка; — Чистая прибыль. ==================================================== ЗАКУПКА ==================================================== Закупка — отдельная функция. Формат печати: A4, книжная ориентация. В закупке: — агрегировать одинаковые ингредиенты; — суммировать количество; — не дублировать одинаковые позиции; — учитывать связанные ингредиенты; — показывать базовую закупочную позицию; — показывать столбец «Из расчета». Колонки: — № — Ингредиент / материал — Количество — Единица — Из расчета — Примечание Пример связанного ингредиента: В рецепте: Белок — 340 гр Связь: 1 яйцо = 51 гр белок = 34 гр от 1 яйца В закупке: Яйцо — 10 шт Из расчета: Белок 340 гр от 10 шт яйца Если есть несколько производных ингредиентов от одного базового, закупка должна агрегировать закупочную позицию корректно. ==================================================== ПЕЧАТЬ ТЕХКАРТЫ ==================================================== Техкарта — отдельная функция. Не путать с красивым PDF-рецептом. Формат: A4, альбомная ориентация. Шапка: Слева: — название рецепта крупно и жирно; — «ТЕХНОЛОГИЧЕСКАЯ КАРТА» мельче и обычным начертанием; — вес; — круглая форма; — квадратная форма. Справа: — заказчик; — телефон; — дата/время; — </text:span><text:soft-page-break/><text:span text:style-name="T1">пожелания/примечания. Дата: дд.мм.гггг Время: 24:00 Основной блок: — рецептура по категориям столбиками; — в каждом столбике: №, продукт, количество; — под категорией технология этой категории. Внизу: — блок «Сборка» на всю ширину; — финансовый итог компактной строкой: продукты; упаковка/инвентарь; доставка; всего. Особое правило: Упаковка не должна смешиваться с производственными категориями. Упаковку выводить: — отдельно последним блоком; или — не выводить в основной производственной части. ==================================================== ПЕЧАТЬ СЕБЕСТОИМОСТИ ==================================================== Себестоимость — отдельная форма. Показывать: — рецепт; — вес; — ингредиенты; — количество; — цена за единицу; — стоимость; — продукты; — упаковка; — доставка; — общая себестоимость; — цена продажи; — прибыль; — наценка. Форма должна быть читаемой и компактной. ==================================================== КРАСИВЫЙ PDF-РЕЦЕПТ ==================================================== Кнопка: «Сохранить рецепт в PDF» Именно так, не «Сохранить PDF». Эта кнопка сохраняет красивый рецепт, а не техкарту. Красивый PDF может включать: — название рецепта; — фото; — ингредиенты; — технологию; — сборку; — оформление; — декоративную подложку; — логотип. Он не должен менять: — техкарту; — закупку; — себестоимость; — расчетные данные. ==================================================== ФОТО И ОФОРМЛЕНИЕ РЕЦЕПТА ==================================================== Блок: «Фото и оформление рецепта» Раскрывающийся блок с иконкой premium camera. Функции: — загрузить главное фото; — открыть кадрирование; — двигать фото; — масштабировать фото; — выбрать квадратный ракурс 1:1 для карточки; — галочка «Выводить фото в распечатку рецепта». Не делать отдельное фото для карточки и отдельное фото для печати. Фото одно, но с настройкой: print: true / false Структура: photo: { src: base64, crop: { x: number, y: number, scale: number }, print: boolean } ==================================================== ====================================================</text:span></text:p>
      <text:p text:style-name="P1"><text:span text:style-name="T1">ИМПОРТ EXCEL — КАНОНИЧЕСКОЕ ПРАВИЛО</text:span></text:p>
      <text:p text:style-name="P1"><text:span text:style-name="T1">====================================================</text:span></text:p>
      <text:p text:style-name="P1"><text:span text:style-name="T1"/></text:p>
      <text:p text:style-name="P1"><text:span text:style-name="T1">Импорт Excel — критически важная логика приложения.</text:span></text:p>
      <text:p text:style-name="P1"><text:span text:style-name="T1"/></text:p>
      <text:p text:style-name="P1"><text:soft-page-break/><text:span text:style-name="T1">Использовать библиотеку xlsx.</text:span></text:p>
      <text:p text:style-name="P1"><text:span text:style-name="T1"/></text:p>
      <text:p text:style-name="P1"><text:span text:style-name="T1">Импорт должен поддерживать:</text:span></text:p>
      <text:p text:style-name="P1"><text:span text:style-name="T1"/></text:p>
      <text:p text:style-name="P1"><text:span text:style-name="T1">1. Импорт базы ингредиентов.</text:span></text:p>
      <text:p text:style-name="P1"><text:span text:style-name="T1">2. Импорт рецепта.</text:span></text:p>
      <text:p text:style-name="P1"><text:span text:style-name="T1">3. Импорт категорий рецепта.</text:span></text:p>
      <text:p text:style-name="P1"><text:span text:style-name="T1">4. Импорт технологий по категориям.</text:span></text:p>
      <text:p text:style-name="P1"><text:span text:style-name="T1">5. Импорт поля «Сборка».</text:span></text:p>
      <text:p text:style-name="P1"><text:span text:style-name="T1">6. Сопоставление ингредиентов рецепта с базой.</text:span></text:p>
      <text:p text:style-name="P1"><text:span text:style-name="T1">7. Автопривязку иконок категорий после импорта.</text:span></text:p>
      <text:p text:style-name="P1"><text:span text:style-name="T1"/></text:p>
      <text:p text:style-name="P1"><text:span text:style-name="T1">Запрещено:</text:span></text:p>
      <text:p text:style-name="P1"><text:span text:style-name="T1">— ломать существующую базу;</text:span></text:p>
      <text:p text:style-name="P1"><text:span text:style-name="T1">— создавать дубли;</text:span></text:p>
      <text:p text:style-name="P1"><text:span text:style-name="T1">— добавлять ингредиенты из рецепта в базу автоматически;</text:span></text:p>
      <text:p text:style-name="P1"><text:span text:style-name="T1">— смешивать «Сборку» с технологиями категорий;</text:span></text:p>
      <text:p text:style-name="P1"><text:span text:style-name="T1">— смешивать упаковку/доставку с производственными категориями;</text:span></text:p>
      <text:p text:style-name="P1"><text:span text:style-name="T1">— искать ингредиенты по цене, единице, весу упаковки или другим полям.</text:span></text:p>
      <text:p text:style-name="P1"><text:span text:style-name="T1"/></text:p>
      <text:p text:style-name="P1"><text:span text:style-name="T1">----------------------------------------------------</text:span></text:p>
      <text:p text:style-name="P1"><text:span text:style-name="T1">1. НОРМАЛИЗАЦИЯ НАЗВАНИЙ</text:span></text:p>
      <text:p text:style-name="P1"><text:span text:style-name="T1">----------------------------------------------------</text:span></text:p>
      <text:p text:style-name="P1"><text:span text:style-name="T1"/></text:p>
      <text:p text:style-name="P1"><text:span text:style-name="T1">Для сравнения ингредиентов использовать normalizeName(value).</text:span></text:p>
      <text:p text:style-name="P1"><text:span text:style-name="T1"/></text:p>
      <text:p text:style-name="P1"><text:span text:style-name="T1">Правила normalizeName:</text:span></text:p>
      <text:p text:style-name="P1"><text:span text:style-name="T1"/></text:p>
      <text:p text:style-name="P1"><text:span text:style-name="T1">— привести к строке;</text:span></text:p>
      <text:p text:style-name="P1"><text:span text:style-name="T1">— trim;</text:span></text:p>
      <text:p text:style-name="P1"><text:span text:style-name="T1">— привести к нижнему регистру;</text:span></text:p>
      <text:p text:style-name="P1"><text:span text:style-name="T1">— заменить «ё» на «е»;</text:span></text:p>
      <text:p text:style-name="P1"><text:span text:style-name="T1">— убрать двойные пробелы;</text:span></text:p>
      <text:p text:style-name="P1"><text:span text:style-name="T1">— убрать лишние невидимые символы;</text:span></text:p>
      <text:p text:style-name="P1"><text:span text:style-name="T1">— по возможности унифицировать пробелы вокруг /, -, скобок.</text:span></text:p>
      <text:p text:style-name="P1"><text:span text:style-name="T1"/></text:p>
      <text:p text:style-name="P1"><text:span text:style-name="T1">Пример:</text:span></text:p>
      <text:p text:style-name="P1"><text:span text:style-name="T1"/></text:p>
      <text:p text:style-name="P1"><text:span text:style-name="T1">"Мука <text:s/>Пшеничная" → "мука пшеничная"</text:span></text:p>
      <text:p text:style-name="P1"><text:span text:style-name="T1">"Сгущёнка" → "сгущенка"</text:span></text:p>
      <text:p text:style-name="P1"><text:span text:style-name="T1"/></text:p>
      <text:p text:style-name="P1"><text:span text:style-name="T1">Сравнение ингредиентов выполнять ТОЛЬКО по нормализованному name.</text:span></text:p>
      <text:p text:style-name="P1"><text:soft-page-break/><text:span text:style-name="T1"/></text:p>
      <text:p text:style-name="P1"><text:span text:style-name="T1">Не учитывать при поиске дублей:</text:span></text:p>
      <text:p text:style-name="P1"><text:span text:style-name="T1">— цену;</text:span></text:p>
      <text:p text:style-name="P1"><text:span text:style-name="T1">— единицу;</text:span></text:p>
      <text:p text:style-name="P1"><text:span text:style-name="T1">— вес упаковки;</text:span></text:p>
      <text:p text:style-name="P1"><text:span text:style-name="T1">— категорию;</text:span></text:p>
      <text:p text:style-name="P1"><text:span text:style-name="T1">— дату обновления.</text:span></text:p>
      <text:p text:style-name="P1"><text:span text:style-name="T1"/></text:p>
      <text:p text:style-name="P1"><text:span text:style-name="T1">----------------------------------------------------</text:span></text:p>
      <text:p text:style-name="P1"><text:span text:style-name="T1">2. ИМПОРТ БАЗЫ ИНГРЕДИЕНТОВ</text:span></text:p>
      <text:p text:style-name="P1"><text:span text:style-name="T1">----------------------------------------------------</text:span></text:p>
      <text:p text:style-name="P1"><text:span text:style-name="T1"/></text:p>
      <text:p text:style-name="P1"><text:span text:style-name="T1">Импорт базы ингредиентов читает Excel-таблицу с колонками.</text:span></text:p>
      <text:p text:style-name="P1"><text:span text:style-name="T1"/></text:p>
      <text:p text:style-name="P1"><text:span text:style-name="T1">Поддерживать разные варианты названий колонок.</text:span></text:p>
      <text:p text:style-name="P1"><text:span text:style-name="T1"/></text:p>
      <text:p text:style-name="P1"><text:span text:style-name="T1">Название ингредиента:</text:span></text:p>
      <text:p text:style-name="P1"><text:span text:style-name="T1"/></text:p>
      <text:p text:style-name="P1"><text:span text:style-name="T1">— Ингредиент</text:span></text:p>
      <text:p text:style-name="P1"><text:span text:style-name="T1">— Материал</text:span></text:p>
      <text:p text:style-name="P1"><text:span text:style-name="T1">— Ингредиент / материал</text:span></text:p>
      <text:p text:style-name="P1"><text:span text:style-name="T1">— Наименование</text:span></text:p>
      <text:p text:style-name="P1"><text:span text:style-name="T1">— Продукт</text:span></text:p>
      <text:p text:style-name="P1"><text:span text:style-name="T1">— Название</text:span></text:p>
      <text:p text:style-name="P1"><text:span text:style-name="T1"/></text:p>
      <text:p text:style-name="P1"><text:span text:style-name="T1">Категория:</text:span></text:p>
      <text:p text:style-name="P1"><text:span text:style-name="T1"/></text:p>
      <text:p text:style-name="P1"><text:span text:style-name="T1">— Категория</text:span></text:p>
      <text:p text:style-name="P1"><text:span text:style-name="T1">— Раздел</text:span></text:p>
      <text:p text:style-name="P1"><text:span text:style-name="T1">— Группа</text:span></text:p>
      <text:p text:style-name="P1"><text:span text:style-name="T1"/></text:p>
      <text:p text:style-name="P1"><text:span text:style-name="T1">Цена:</text:span></text:p>
      <text:p text:style-name="P1"><text:span text:style-name="T1"/></text:p>
      <text:p text:style-name="P1"><text:span text:style-name="T1">— Цена</text:span></text:p>
      <text:p text:style-name="P1"><text:span text:style-name="T1">— Стоимость</text:span></text:p>
      <text:p text:style-name="P1"><text:span text:style-name="T1">— Цена упаковки</text:span></text:p>
      <text:p text:style-name="P1"><text:span text:style-name="T1">— Закупочная цена</text:span></text:p>
      <text:p text:style-name="P1"><text:span text:style-name="T1"/></text:p>
      <text:p text:style-name="P1"><text:span text:style-name="T1">Вес упаковки / количество в закупочной единице:</text:span></text:p>
      <text:p text:style-name="P1"><text:span text:style-name="T1"/></text:p>
      <text:p text:style-name="P1"><text:span text:style-name="T1">— Вес упаковки</text:span></text:p>
      <text:p text:style-name="P1"><text:span text:style-name="T1">— Фасовка</text:span></text:p>
      <text:p text:style-name="P1"><text:span text:style-name="T1">— Вес</text:span></text:p>
      <text:p text:style-name="P1"><text:span text:style-name="T1">— Количество</text:span></text:p>
      <text:p text:style-name="P1"><text:soft-page-break/><text:span text:style-name="T1">— Кол-во в упаковке</text:span></text:p>
      <text:p text:style-name="P1"><text:span text:style-name="T1">— Объем</text:span></text:p>
      <text:p text:style-name="P1"><text:span text:style-name="T1">— Объём</text:span></text:p>
      <text:p text:style-name="P1"><text:span text:style-name="T1"/></text:p>
      <text:p text:style-name="P1"><text:span text:style-name="T1">Единица:</text:span></text:p>
      <text:p text:style-name="P1"><text:span text:style-name="T1"/></text:p>
      <text:p text:style-name="P1"><text:span text:style-name="T1">— Единица</text:span></text:p>
      <text:p text:style-name="P1"><text:span text:style-name="T1">— Ед.</text:span></text:p>
      <text:p text:style-name="P1"><text:span text:style-name="T1">— Ед. изм.</text:span></text:p>
      <text:p text:style-name="P1"><text:span text:style-name="T1">— Единица измерения</text:span></text:p>
      <text:p text:style-name="P1"><text:span text:style-name="T1"/></text:p>
      <text:p text:style-name="P1"><text:span text:style-name="T1">Цена за единицу:</text:span></text:p>
      <text:p text:style-name="P1"><text:span text:style-name="T1"/></text:p>
      <text:p text:style-name="P1"><text:span text:style-name="T1">— Цена за грамм</text:span></text:p>
      <text:p text:style-name="P1"><text:span text:style-name="T1">— Цена за гр</text:span></text:p>
      <text:p text:style-name="P1"><text:span text:style-name="T1">— Цена/гр</text:span></text:p>
      <text:p text:style-name="P1"><text:span text:style-name="T1">— Цена за единицу</text:span></text:p>
      <text:p text:style-name="P1"><text:span text:style-name="T1">— unitPrice</text:span></text:p>
      <text:p text:style-name="P1"><text:span text:style-name="T1"/></text:p>
      <text:p text:style-name="P1"><text:span text:style-name="T1">----------------------------------------------------</text:span></text:p>
      <text:p text:style-name="P1"><text:span text:style-name="T1">Логика импорта базы</text:span></text:p>
      <text:p text:style-name="P1"><text:span text:style-name="T1">----------------------------------------------------</text:span></text:p>
      <text:p text:style-name="P1"><text:span text:style-name="T1"/></text:p>
      <text:p text:style-name="P1"><text:span text:style-name="T1">Для каждой строки:</text:span></text:p>
      <text:p text:style-name="P1"><text:span text:style-name="T1"/></text:p>
      <text:p text:style-name="P1"><text:span text:style-name="T1">1. Прочитать название ингредиента.</text:span></text:p>
      <text:p text:style-name="P1"><text:span text:style-name="T1">2. Если название пустое — пропустить строку.</text:span></text:p>
      <text:p text:style-name="P1"><text:span text:style-name="T1">3. Нормализовать название через normalizeName.</text:span></text:p>
      <text:p text:style-name="P1"><text:span text:style-name="T1">4. Найти существующую позицию в базе только по name.</text:span></text:p>
      <text:p text:style-name="P1"><text:span text:style-name="T1">5. Если позиция существует:</text:span></text:p>
      <text:p text:style-name="P1"><text:span text:style-name="T1"><text:s text:c="3"/>— обновить категорию, если передана;</text:span></text:p>
      <text:p text:style-name="P1"><text:span text:style-name="T1"><text:s text:c="3"/>— обновить цену;</text:span></text:p>
      <text:p text:style-name="P1"><text:span text:style-name="T1"><text:s text:c="3"/>— обновить вес упаковки;</text:span></text:p>
      <text:p text:style-name="P1"><text:span text:style-name="T1"><text:s text:c="3"/>— обновить единицу;</text:span></text:p>
      <text:p text:style-name="P1"><text:span text:style-name="T1"><text:s text:c="3"/>— пересчитать unitPrice;</text:span></text:p>
      <text:p text:style-name="P1"><text:span text:style-name="T1"><text:s text:c="3"/>— если цена изменилась, записать updatedAt в формате дд.мм;</text:span></text:p>
      <text:p text:style-name="P1"><text:span text:style-name="T1"><text:s text:c="3"/>— не создавать дубль.</text:span></text:p>
      <text:p text:style-name="P1"><text:span text:style-name="T1">6. Если позиции нет:</text:span></text:p>
      <text:p text:style-name="P1"><text:span text:style-name="T1"><text:s text:c="3"/>— создать новую позицию;</text:span></text:p>
      <text:p text:style-name="P1"><text:span text:style-name="T1"><text:s text:c="3"/>— рассчитать unitPrice;</text:span></text:p>
      <text:p text:style-name="P1"><text:span text:style-name="T1"><text:s text:c="3"/>— записать updatedAt, если есть цена;</text:span></text:p>
      <text:p text:style-name="P1"><text:span text:style-name="T1"><text:s text:c="3"/>— добавить в базу.</text:span></text:p>
      <text:p text:style-name="P1"><text:span text:style-name="T1"/></text:p>
      <text:p text:style-name="P1"><text:span text:style-name="T1">Формула:</text:span></text:p>
      <text:p text:style-name="P1"><text:soft-page-break/><text:span text:style-name="T1"/></text:p>
      <text:p text:style-name="P1"><text:span text:style-name="T1">unitPrice = price / packageWeight</text:span></text:p>
      <text:p text:style-name="P1"><text:span text:style-name="T1"/></text:p>
      <text:p text:style-name="P1"><text:span text:style-name="T1">Если price или packageWeight отсутствуют:</text:span></text:p>
      <text:p text:style-name="P1"><text:span text:style-name="T1"/></text:p>
      <text:p text:style-name="P1"><text:span text:style-name="T1">unitPrice = 0</text:span></text:p>
      <text:p text:style-name="P1"><text:span text:style-name="T1"/></text:p>
      <text:p text:style-name="P1"><text:span text:style-name="T1">Округление unitPrice:</text:span></text:p>
      <text:p text:style-name="P1"><text:span text:style-name="T1"/></text:p>
      <text:p text:style-name="P1"><text:span text:style-name="T1">до 3 знаков после запятой.</text:span></text:p>
      <text:p text:style-name="P1"><text:span text:style-name="T1"/></text:p>
      <text:p text:style-name="P1"><text:span text:style-name="T1">После импорта:</text:span></text:p>
      <text:p text:style-name="P1"><text:span text:style-name="T1"/></text:p>
      <text:p text:style-name="P1"><text:span text:style-name="T1">— сохранить базу в localStorage;</text:span></text:p>
      <text:p text:style-name="P1"><text:span text:style-name="T1">— отсортировать по алфавиту;</text:span></text:p>
      <text:p text:style-name="P1"><text:span text:style-name="T1">— показать toast об успешном импорте;</text:span></text:p>
      <text:p text:style-name="P1"><text:span text:style-name="T1">— подсветить обновленные/новые позиции;</text:span></text:p>
      <text:p text:style-name="P1"><text:span text:style-name="T1">— не очищать старую базу без прямого запроса пользователя.</text:span></text:p>
      <text:p text:style-name="P1"><text:span text:style-name="T1"/></text:p>
      <text:p text:style-name="P1"><text:span text:style-name="T1">----------------------------------------------------</text:span></text:p>
      <text:p text:style-name="P1"><text:span text:style-name="T1">3. ЗАЩИТА ОТ ДУБЛЕЙ ПРИ ИМПОРТЕ БАЗЫ</text:span></text:p>
      <text:p text:style-name="P1"><text:span text:style-name="T1">----------------------------------------------------</text:span></text:p>
      <text:p text:style-name="P1"><text:span text:style-name="T1"/></text:p>
      <text:p text:style-name="P1"><text:span text:style-name="T1">Если в Excel есть несколько строк с одинаковым названием:</text:span></text:p>
      <text:p text:style-name="P1"><text:span text:style-name="T1"/></text:p>
      <text:p text:style-name="P1"><text:span text:style-name="T1">— не создавать несколько записей;</text:span></text:p>
      <text:p text:style-name="P1"><text:span text:style-name="T1">— использовать последнюю непустую актуальную строку;</text:span></text:p>
      <text:p text:style-name="P1"><text:span text:style-name="T1">— или аккуратно обновлять одну и ту же позицию.</text:span></text:p>
      <text:p text:style-name="P1"><text:span text:style-name="T1"/></text:p>
      <text:p text:style-name="P1"><text:span text:style-name="T1">Если найден похожий ингредиент:</text:span></text:p>
      <text:p text:style-name="P1"><text:span text:style-name="T1"/></text:p>
      <text:p text:style-name="P1"><text:span text:style-name="T1">— показать список похожих позиций;</text:span></text:p>
      <text:p text:style-name="P1"><text:span text:style-name="T1">— не молчать;</text:span></text:p>
      <text:p text:style-name="P1"><text:span text:style-name="T1">— не показывать только абстрактное «дубль найден».</text:span></text:p>
      <text:p text:style-name="P1"><text:span text:style-name="T1"/></text:p>
      <text:p text:style-name="P1"><text:span text:style-name="T1">Пример:</text:span></text:p>
      <text:p text:style-name="P1"><text:span text:style-name="T1"/></text:p>
      <text:p text:style-name="P1"><text:span text:style-name="T1">Похожие позиции:</text:span></text:p>
      <text:p text:style-name="P1"><text:span text:style-name="T1">— Мука пшеничная</text:span></text:p>
      <text:p text:style-name="P1"><text:span text:style-name="T1">— Мука пшеничная высший сорт</text:span></text:p>
      <text:p text:style-name="P1"><text:span text:style-name="T1"/></text:p>
      <text:p text:style-name="P1"><text:span text:style-name="T1">----------------------------------------------------</text:span></text:p>
      <text:p text:style-name="P1"><text:span text:style-name="T1">4. ИМПОРТ РЕЦЕПТА</text:span></text:p>
      <text:p text:style-name="P1"><text:span text:style-name="T1">----------------------------------------------------</text:span></text:p>
      <text:p text:style-name="P1"><text:soft-page-break/><text:span text:style-name="T1"/></text:p>
      <text:p text:style-name="P1"><text:span text:style-name="T1">Импорт рецепта читает Excel как рецептурную карту.</text:span></text:p>
      <text:p text:style-name="P1"><text:span text:style-name="T1"/></text:p>
      <text:p text:style-name="P1"><text:span text:style-name="T1">Основная ожидаемая структура:</text:span></text:p>
      <text:p text:style-name="P1"><text:span text:style-name="T1"/></text:p>
      <text:p text:style-name="P1"><text:span text:style-name="T1">Колонка 1 — категория / блок.</text:span></text:p>
      <text:p text:style-name="P1"><text:span text:style-name="T1">Колонка 2 — ингредиент / продукт.</text:span></text:p>
      <text:p text:style-name="P1"><text:span text:style-name="T1">Колонка 3 — количество / грамм.</text:span></text:p>
      <text:p text:style-name="P1"><text:span text:style-name="T1"/></text:p>
      <text:p text:style-name="P1"><text:span text:style-name="T1">Дополнительно могут быть колонки:</text:span></text:p>
      <text:p text:style-name="P1"><text:span text:style-name="T1"/></text:p>
      <text:p text:style-name="P1"><text:span text:style-name="T1">— Технология</text:span></text:p>
      <text:p text:style-name="P1"><text:span text:style-name="T1">— Сборка</text:span></text:p>
      <text:p text:style-name="P1"><text:span text:style-name="T1">— Примечание</text:span></text:p>
      <text:p text:style-name="P1"><text:span text:style-name="T1">— Единица</text:span></text:p>
      <text:p text:style-name="P1"><text:span text:style-name="T1">— Категория</text:span></text:p>
      <text:p text:style-name="P1"><text:span text:style-name="T1"/></text:p>
      <text:p text:style-name="P1"><text:span text:style-name="T1">Импорт должен быть гибким: если явных заголовков нет, читать первые три значимые колонки как:</text:span></text:p>
      <text:p text:style-name="P1"><text:span text:style-name="T1"/></text:p>
      <text:p text:style-name="P1"><text:span text:style-name="T1">categoryCandidate</text:span></text:p>
      <text:p text:style-name="P1"><text:span text:style-name="T1">ingredientCandidate</text:span></text:p>
      <text:p text:style-name="P1"><text:span text:style-name="T1">amountCandidate</text:span></text:p>
      <text:p text:style-name="P1"><text:span text:style-name="T1"/></text:p>
      <text:p text:style-name="P1"><text:span text:style-name="T1">----------------------------------------------------</text:span></text:p>
      <text:p text:style-name="P1"><text:span text:style-name="T1">5. ОПРЕДЕЛЕНИЕ КАТЕГОРИИ В РЕЦЕПТЕ</text:span></text:p>
      <text:p text:style-name="P1"><text:span text:style-name="T1">----------------------------------------------------</text:span></text:p>
      <text:p text:style-name="P1"><text:span text:style-name="T1"/></text:p>
      <text:p text:style-name="P1"><text:span text:style-name="T1">Категория — это строка или ячейка, которая:</text:span></text:p>
      <text:p text:style-name="P1"><text:span text:style-name="T1"/></text:p>
      <text:p text:style-name="P1"><text:span text:style-name="T1">— содержит текст;</text:span></text:p>
      <text:p text:style-name="P1"><text:span text:style-name="T1">— не является числом;</text:span></text:p>
      <text:p text:style-name="P1"><text:span text:style-name="T1">— не является количеством;</text:span></text:p>
      <text:p text:style-name="P1"><text:span text:style-name="T1">— не является известным ингредиентом из базы;</text:span></text:p>
      <text:p text:style-name="P1"><text:span text:style-name="T1">— стоит отдельно или в первой колонке;</text:span></text:p>
      <text:p text:style-name="P1"><text:span text:style-name="T1">— задает блок для последующих ингредиентов.</text:span></text:p>
      <text:p text:style-name="P1"><text:span text:style-name="T1"/></text:p>
      <text:p text:style-name="P1"><text:span text:style-name="T1">Если строка содержит только название блока, например:</text:span></text:p>
      <text:p text:style-name="P1"><text:span text:style-name="T1"/></text:p>
      <text:p text:style-name="P1"><text:span text:style-name="T1">Бисквит</text:span></text:p>
      <text:p text:style-name="P1"><text:span text:style-name="T1"/></text:p>
      <text:p text:style-name="P1"><text:span text:style-name="T1">и рядом нет ингредиента/количества, считать это категорией.</text:span></text:p>
      <text:p text:style-name="P1"><text:span text:style-name="T1"/></text:p>
      <text:p text:style-name="P1"><text:span text:style-name="T1">Все следующие ингредиенты относятся к этой категории до </text:span><text:soft-page-break/><text:span text:style-name="T1">появления новой категории.</text:span></text:p>
      <text:p text:style-name="P1"><text:span text:style-name="T1"/></text:p>
      <text:p text:style-name="P1"><text:span text:style-name="T1">Если в строке явно есть категория в первой колонке, ингредиент во второй, количество в третьей — использовать категорию из первой колонки.</text:span></text:p>
      <text:p text:style-name="P1"><text:span text:style-name="T1"/></text:p>
      <text:p text:style-name="P1"><text:span text:style-name="T1">Если категория пустая, использовать последнюю найденную текущую категорию.</text:span></text:p>
      <text:p text:style-name="P1"><text:span text:style-name="T1"/></text:p>
      <text:p text:style-name="P1"><text:span text:style-name="T1">----------------------------------------------------</text:span></text:p>
      <text:p text:style-name="P1"><text:span text:style-name="T1">6. ОПРЕДЕЛЕНИЕ ИНГРЕДИЕНТА В РЕЦЕПТЕ</text:span></text:p>
      <text:p text:style-name="P1"><text:span text:style-name="T1">----------------------------------------------------</text:span></text:p>
      <text:p text:style-name="P1"><text:span text:style-name="T1"/></text:p>
      <text:p text:style-name="P1"><text:span text:style-name="T1">Ингредиент — это строка, где есть:</text:span></text:p>
      <text:p text:style-name="P1"><text:span text:style-name="T1"/></text:p>
      <text:p text:style-name="P1"><text:span text:style-name="T1">— название продукта;</text:span></text:p>
      <text:p text:style-name="P1"><text:span text:style-name="T1">— количество;</text:span></text:p>
      <text:p text:style-name="P1"><text:span text:style-name="T1">— текущая категория или категория в этой же строке.</text:span></text:p>
      <text:p text:style-name="P1"><text:span text:style-name="T1"/></text:p>
      <text:p text:style-name="P1"><text:span text:style-name="T1">Количество может быть:</text:span></text:p>
      <text:p text:style-name="P1"><text:span text:style-name="T1"/></text:p>
      <text:p text:style-name="P1"><text:span text:style-name="T1">— числом;</text:span></text:p>
      <text:p text:style-name="P1"><text:span text:style-name="T1">— строкой с числом;</text:span></text:p>
      <text:p text:style-name="P1"><text:span text:style-name="T1">— строкой с единицей, например «120 г», «2 шт», «1 уп».</text:span></text:p>
      <text:p text:style-name="P1"><text:span text:style-name="T1"/></text:p>
      <text:p text:style-name="P1"><text:span text:style-name="T1">Нужно извлечь:</text:span></text:p>
      <text:p text:style-name="P1"><text:span text:style-name="T1"/></text:p>
      <text:p text:style-name="P1"><text:span text:style-name="T1">amount = число</text:span></text:p>
      <text:p text:style-name="P1"><text:span text:style-name="T1">unit = единица, если указана</text:span></text:p>
      <text:p text:style-name="P1"><text:span text:style-name="T1"/></text:p>
      <text:p text:style-name="P1"><text:span text:style-name="T1">Если единица не указана:</text:span></text:p>
      <text:p text:style-name="P1"><text:span text:style-name="T1"/></text:p>
      <text:p text:style-name="P1"><text:span text:style-name="T1">— взять единицу из базы ингредиентов, если ингредиент найден;</text:span></text:p>
      <text:p text:style-name="P1"><text:span text:style-name="T1">— иначе использовать «гр» по умолчанию для производственных ингредиентов.</text:span></text:p>
      <text:p text:style-name="P1"><text:span text:style-name="T1"/></text:p>
      <text:p text:style-name="P1"><text:span text:style-name="T1">Ингредиенты рецепта НЕ добавлять автоматически в базу ингредиентов.</text:span></text:p>
      <text:p text:style-name="P1"><text:span text:style-name="T1"/></text:p>
      <text:p text:style-name="P1"><text:span text:style-name="T1">Если ингредиент найден в базе:</text:span></text:p>
      <text:p text:style-name="P1"><text:span text:style-name="T1">— связать recipeIngredient.ingredientId с базовой позицией;</text:span></text:p>
      <text:p text:style-name="P1"><text:span text:style-name="T1">— подтянуть unit;</text:span></text:p>
      <text:p text:style-name="P1"><text:span text:style-name="T1">— использовать unitPrice для себестоимости.</text:span></text:p>
      <text:p text:style-name="P1"><text:span text:style-name="T1"/></text:p>
      <text:p text:style-name="P1"><text:soft-page-break/><text:span text:style-name="T1">Если ингредиент не найден:</text:span></text:p>
      <text:p text:style-name="P1"><text:span text:style-name="T1">— оставить ingredientId = null;</text:span></text:p>
      <text:p text:style-name="P1"><text:span text:style-name="T1">— подсветить позицию как без цены;</text:span></text:p>
      <text:p text:style-name="P1"><text:span text:style-name="T1">— себестоимость по нему = 0 до сопоставления.</text:span></text:p>
      <text:p text:style-name="P1"><text:span text:style-name="T1"/></text:p>
      <text:p text:style-name="P1"><text:span text:style-name="T1">----------------------------------------------------</text:span></text:p>
      <text:p text:style-name="P1"><text:span text:style-name="T1">7. ИМПОРТ ТЕХНОЛОГИИ</text:span></text:p>
      <text:p text:style-name="P1"><text:span text:style-name="T1">----------------------------------------------------</text:span></text:p>
      <text:p text:style-name="P1"><text:span text:style-name="T1"/></text:p>
      <text:p text:style-name="P1"><text:span text:style-name="T1">Технология должна попадать в technologies[category].</text:span></text:p>
      <text:p text:style-name="P1"><text:span text:style-name="T1"/></text:p>
      <text:p text:style-name="P1"><text:span text:style-name="T1">Технологию можно распознавать:</text:span></text:p>
      <text:p text:style-name="P1"><text:span text:style-name="T1"/></text:p>
      <text:p text:style-name="P1"><text:span text:style-name="T1">1. Из отдельной колонки «Технология».</text:span></text:p>
      <text:p text:style-name="P1"><text:span text:style-name="T1">2. Из текстовых строк после ингредиентов категории.</text:span></text:p>
      <text:p text:style-name="P1"><text:span text:style-name="T1">3. Из блока, который следует за рецептурой конкретной категории.</text:span></text:p>
      <text:p text:style-name="P1"><text:span text:style-name="T1"/></text:p>
      <text:p text:style-name="P1"><text:span text:style-name="T1">Правило:</text:span></text:p>
      <text:p text:style-name="P1"><text:span text:style-name="T1"/></text:p>
      <text:p text:style-name="P1"><text:span text:style-name="T1">Если текст относится к текущей категории и не является ингредиентом, количеством или новой категорией — добавить его в технологию текущей категории.</text:span></text:p>
      <text:p text:style-name="P1"><text:span text:style-name="T1"/></text:p>
      <text:p text:style-name="P1"><text:span text:style-name="T1">Не записывать технологию в ингредиенты.</text:span></text:p>
      <text:p text:style-name="P1"><text:span text:style-name="T1"/></text:p>
      <text:p text:style-name="P1"><text:span text:style-name="T1">Не создавать из технологии категорию.</text:span></text:p>
      <text:p text:style-name="P1"><text:span text:style-name="T1"/></text:p>
      <text:p text:style-name="P1"><text:span text:style-name="T1">Не смешивать технологию с полем «Сборка».</text:span></text:p>
      <text:p text:style-name="P1"><text:span text:style-name="T1"/></text:p>
      <text:p text:style-name="P1"><text:span text:style-name="T1">----------------------------------------------------</text:span></text:p>
      <text:p text:style-name="P1"><text:span text:style-name="T1">8. ИМПОРТ СБОРКИ</text:span></text:p>
      <text:p text:style-name="P1"><text:span text:style-name="T1">----------------------------------------------------</text:span></text:p>
      <text:p text:style-name="P1"><text:span text:style-name="T1"/></text:p>
      <text:p text:style-name="P1"><text:span text:style-name="T1">«Сборка» — отдельное поле рецепта:</text:span></text:p>
      <text:p text:style-name="P1"><text:span text:style-name="T1"/></text:p>
      <text:p text:style-name="P1"><text:span text:style-name="T1">recipe.assembly</text:span></text:p>
      <text:p text:style-name="P1"><text:span text:style-name="T1"/></text:p>
      <text:p text:style-name="P1"><text:span text:style-name="T1">Сборка НЕ является категорией.</text:span></text:p>
      <text:p text:style-name="P1"><text:span text:style-name="T1">Сборка НЕ является технологией конкретной категории.</text:span></text:p>
      <text:p text:style-name="P1"><text:span text:style-name="T1"/></text:p>
      <text:p text:style-name="P1"><text:span text:style-name="T1">Импорт должен поддерживать два варианта.</text:span></text:p>
      <text:p text:style-name="P1"><text:span text:style-name="T1"/></text:p>
      <text:p text:style-name="P1"><text:span text:style-name="T1">Вариант 1: отдельная колонка «Сборка».</text:span></text:p>
      <text:p text:style-name="P1"><text:span text:style-name="T1"/></text:p>
      <text:p text:style-name="P1"><text:soft-page-break/><text:span text:style-name="T1">Если в Excel есть колонка с заголовком:</text:span></text:p>
      <text:p text:style-name="P1"><text:span text:style-name="T1"/></text:p>
      <text:p text:style-name="P1"><text:span text:style-name="T1">— Сборка</text:span></text:p>
      <text:p text:style-name="P1"><text:span text:style-name="T1">— Сборка изделия</text:span></text:p>
      <text:p text:style-name="P1"><text:span text:style-name="T1">— Сборка торта</text:span></text:p>
      <text:p text:style-name="P1"><text:span text:style-name="T1">— Assembly</text:span></text:p>
      <text:p text:style-name="P1"><text:span text:style-name="T1"/></text:p>
      <text:p text:style-name="P1"><text:span text:style-name="T1">то все непустые значения этой колонки нужно объединить в recipe.assembly.</text:span></text:p>
      <text:p text:style-name="P1"><text:span text:style-name="T1"/></text:p>
      <text:p text:style-name="P1"><text:span text:style-name="T1">Вариант 2: отдельный блок/строка «Сборка».</text:span></text:p>
      <text:p text:style-name="P1"><text:span text:style-name="T1"/></text:p>
      <text:p text:style-name="P1"><text:span text:style-name="T1">Если встречается строка:</text:span></text:p>
      <text:p text:style-name="P1"><text:span text:style-name="T1"/></text:p>
      <text:p text:style-name="P1"><text:span text:style-name="T1">Сборка</text:span></text:p>
      <text:p text:style-name="P1"><text:span text:style-name="T1"/></text:p>
      <text:p text:style-name="P1"><text:span text:style-name="T1">то все следующие текстовые строки до новой явной категории или конца таблицы записывать в recipe.assembly.</text:span></text:p>
      <text:p text:style-name="P1"><text:span text:style-name="T1"/></text:p>
      <text:p text:style-name="P1"><text:span text:style-name="T1">Если рядом со строкой «Сборка» уже есть текст — добавить этот текст в assembly.</text:span></text:p>
      <text:p text:style-name="P1"><text:span text:style-name="T1"/></text:p>
      <text:p text:style-name="P1"><text:span text:style-name="T1">Важно:</text:span></text:p>
      <text:p text:style-name="P1"><text:span text:style-name="T1"/></text:p>
      <text:p text:style-name="P1"><text:span text:style-name="T1">При импорте сборка должна заполнить окно/поле «Сборка» в рецепте.</text:span></text:p>
      <text:p text:style-name="P1"><text:span text:style-name="T1"/></text:p>
      <text:p text:style-name="P1"><text:span text:style-name="T1">Нельзя:</text:span></text:p>
      <text:p text:style-name="P1"><text:span text:style-name="T1">— класть сборку в технологию категории;</text:span></text:p>
      <text:p text:style-name="P1"><text:span text:style-name="T1">— создавать категорию «Сборка»;</text:span></text:p>
      <text:p text:style-name="P1"><text:span text:style-name="T1">— терять сборку при сохранении рецепта;</text:span></text:p>
      <text:p text:style-name="P1"><text:span text:style-name="T1">— выводить сборку среди ингредиентов.</text:span></text:p>
      <text:p text:style-name="P1"><text:span text:style-name="T1"/></text:p>
      <text:p text:style-name="P1"><text:span text:style-name="T1">В техкарте сборка выводится отдельным блоком внизу на всю ширину.</text:span></text:p>
      <text:p text:style-name="P1"><text:span text:style-name="T1"/></text:p>
      <text:p text:style-name="P1"><text:span text:style-name="T1">----------------------------------------------------</text:span></text:p>
      <text:p text:style-name="P1"><text:span text:style-name="T1">9. КАТЕГОРИИ ПОСЛЕ ИМПОРТА</text:span></text:p>
      <text:p text:style-name="P1"><text:span text:style-name="T1">----------------------------------------------------</text:span></text:p>
      <text:p text:style-name="P1"><text:span text:style-name="T1"/></text:p>
      <text:p text:style-name="P1"><text:span text:style-name="T1">При импорте рецепта категории могут приходить из Excel.</text:span></text:p>
      <text:p text:style-name="P1"><text:span text:style-name="T1"/></text:p>
      <text:p text:style-name="P1"><text:span text:style-name="T1">Но их нужно нормализовать.</text:span></text:p>
      <text:p text:style-name="P1"><text:span text:style-name="T1"/></text:p>
      <text:p text:style-name="P1"><text:span text:style-name="T1">Если встречаются уточненные названия:</text:span></text:p>
      <text:p text:style-name="P1"><text:soft-page-break/><text:span text:style-name="T1"/></text:p>
      <text:p text:style-name="P1"><text:span text:style-name="T1">— Банановый мусс</text:span></text:p>
      <text:p text:style-name="P1"><text:span text:style-name="T1">— Клубничный мусс</text:span></text:p>
      <text:p text:style-name="P1"><text:span text:style-name="T1">— Шоколадный мусс</text:span></text:p>
      <text:p text:style-name="P1"><text:span text:style-name="T1"/></text:p>
      <text:p text:style-name="P1"><text:span text:style-name="T1">категория может остаться с исходным названием, но иконку использовать от «Мусс».</text:span></text:p>
      <text:p text:style-name="P1"><text:span text:style-name="T1"/></text:p>
      <text:p text:style-name="P1"><text:span text:style-name="T1">Если встречаются:</text:span></text:p>
      <text:p text:style-name="P1"><text:span text:style-name="T1"/></text:p>
      <text:p text:style-name="P1"><text:span text:style-name="T1">— Сливочный крем</text:span></text:p>
      <text:p text:style-name="P1"><text:span text:style-name="T1">— Масляный крем</text:span></text:p>
      <text:p text:style-name="P1"><text:span text:style-name="T1">— Заварной крем</text:span></text:p>
      <text:p text:style-name="P1"><text:span text:style-name="T1"/></text:p>
      <text:p text:style-name="P1"><text:span text:style-name="T1">иконку использовать от «Крем».</text:span></text:p>
      <text:p text:style-name="P1"><text:span text:style-name="T1"/></text:p>
      <text:p text:style-name="P1"><text:span text:style-name="T1">Если встречаются:</text:span></text:p>
      <text:p text:style-name="P1"><text:span text:style-name="T1"/></text:p>
      <text:p text:style-name="P1"><text:span text:style-name="T1">— Шоколадный ганаш</text:span></text:p>
      <text:p text:style-name="P1"><text:span text:style-name="T1">— Белый ганаш</text:span></text:p>
      <text:p text:style-name="P1"><text:span text:style-name="T1"/></text:p>
      <text:p text:style-name="P1"><text:span text:style-name="T1">иконку использовать от «Ганаш».</text:span></text:p>
      <text:p text:style-name="P1"><text:span text:style-name="T1"/></text:p>
      <text:p text:style-name="P1"><text:span text:style-name="T1">Если встречаются:</text:span></text:p>
      <text:p text:style-name="P1"><text:span text:style-name="T1"/></text:p>
      <text:p text:style-name="P1"><text:span text:style-name="T1">— Малиновый джем</text:span></text:p>
      <text:p text:style-name="P1"><text:span text:style-name="T1">— Клубничный джем</text:span></text:p>
      <text:p text:style-name="P1"><text:span text:style-name="T1"/></text:p>
      <text:p text:style-name="P1"><text:span text:style-name="T1">иконку использовать от «Джем».</text:span></text:p>
      <text:p text:style-name="P1"><text:span text:style-name="T1"/></text:p>
      <text:p text:style-name="P1"><text:span text:style-name="T1">Если встречаются:</text:span></text:p>
      <text:p text:style-name="P1"><text:span text:style-name="T1"/></text:p>
      <text:p text:style-name="P1"><text:span text:style-name="T1">— Малиновая вставка</text:span></text:p>
      <text:p text:style-name="P1"><text:span text:style-name="T1">— Клубничная вставка</text:span></text:p>
      <text:p text:style-name="P1"><text:span text:style-name="T1">— Ягодная вставка</text:span></text:p>
      <text:p text:style-name="P1"><text:span text:style-name="T1"/></text:p>
      <text:p text:style-name="P1"><text:span text:style-name="T1">иконку использовать от «Ягодная вставка».</text:span></text:p>
      <text:p text:style-name="P1"><text:span text:style-name="T1"/></text:p>
      <text:p text:style-name="P1"><text:span text:style-name="T1">----------------------------------------------------</text:span></text:p>
      <text:p text:style-name="P1"><text:span text:style-name="T1">10. НЕ СОЗДАВАТЬ ЛИШНИЕ СЛУЖЕБНЫЕ КАТЕГОРИИ</text:span></text:p>
      <text:p text:style-name="P1"><text:span text:style-name="T1">----------------------------------------------------</text:span></text:p>
      <text:p text:style-name="P1"><text:span text:style-name="T1"/></text:p>
      <text:p text:style-name="P1"><text:span text:style-name="T1">Если в импорте встречаются:</text:span></text:p>
      <text:p text:style-name="P1"><text:span text:style-name="T1"/></text:p>
      <text:p text:style-name="P1"><text:soft-page-break/><text:span text:style-name="T1">— Насадки</text:span></text:p>
      <text:p text:style-name="P1"><text:span text:style-name="T1">— Формы</text:span></text:p>
      <text:p text:style-name="P1"><text:span text:style-name="T1">— Молды</text:span></text:p>
      <text:p text:style-name="P1"><text:span text:style-name="T1">— Ацетат</text:span></text:p>
      <text:p text:style-name="P1"><text:span text:style-name="T1">— Мешки</text:span></text:p>
      <text:p text:style-name="P1"><text:span text:style-name="T1">— Трафареты</text:span></text:p>
      <text:p text:style-name="P1"><text:span text:style-name="T1">— Вырубки</text:span></text:p>
      <text:p text:style-name="P1"><text:span text:style-name="T1"/></text:p>
      <text:p text:style-name="P1"><text:span text:style-name="T1">не создавать отдельные категории рецепта.</text:span></text:p>
      <text:p text:style-name="P1"><text:span text:style-name="T1"/></text:p>
      <text:p text:style-name="P1"><text:span text:style-name="T1">Нормализовать в категорию:</text:span></text:p>
      <text:p text:style-name="P1"><text:span text:style-name="T1"/></text:p>
      <text:p text:style-name="P1"><text:span text:style-name="T1">Инструменты</text:span></text:p>
      <text:p text:style-name="P1"><text:span text:style-name="T1"/></text:p>
      <text:p text:style-name="P1"><text:span text:style-name="T1">Если встречаются:</text:span></text:p>
      <text:p text:style-name="P1"><text:span text:style-name="T1"/></text:p>
      <text:p text:style-name="P1"><text:span text:style-name="T1">— Ягоды</text:span></text:p>
      <text:p text:style-name="P1"><text:span text:style-name="T1">— Посыпки</text:span></text:p>
      <text:p text:style-name="P1"><text:span text:style-name="T1">— Изомальт</text:span></text:p>
      <text:p text:style-name="P1"><text:span text:style-name="T1">— Сусальное золото</text:span></text:p>
      <text:p text:style-name="P1"><text:span text:style-name="T1">— Цветы</text:span></text:p>
      <text:p text:style-name="P1"><text:span text:style-name="T1">— Топперы</text:span></text:p>
      <text:p text:style-name="P1"><text:span text:style-name="T1">— Шоколадный декор</text:span></text:p>
      <text:p text:style-name="P1"><text:span text:style-name="T1">— Безе-декор</text:span></text:p>
      <text:p text:style-name="P1"><text:span text:style-name="T1">— Фигурки</text:span></text:p>
      <text:p text:style-name="P1"><text:span text:style-name="T1"/></text:p>
      <text:p text:style-name="P1"><text:span text:style-name="T1">нормализовать в категорию:</text:span></text:p>
      <text:p text:style-name="P1"><text:span text:style-name="T1"/></text:p>
      <text:p text:style-name="P1"><text:span text:style-name="T1">Декор</text:span></text:p>
      <text:p text:style-name="P1"><text:span text:style-name="T1"/></text:p>
      <text:p text:style-name="P1"><text:span text:style-name="T1">Если встречаются:</text:span></text:p>
      <text:p text:style-name="P1"><text:span text:style-name="T1"/></text:p>
      <text:p text:style-name="P1"><text:span text:style-name="T1">— Коробки</text:span></text:p>
      <text:p text:style-name="P1"><text:span text:style-name="T1">— Подложки</text:span></text:p>
      <text:p text:style-name="P1"><text:span text:style-name="T1">— Ленты</text:span></text:p>
      <text:p text:style-name="P1"><text:span text:style-name="T1">— Бирки</text:span></text:p>
      <text:p text:style-name="P1"><text:span text:style-name="T1">— Наклейки</text:span></text:p>
      <text:p text:style-name="P1"><text:span text:style-name="T1">— Расходники</text:span></text:p>
      <text:p text:style-name="P1"><text:span text:style-name="T1"/></text:p>
      <text:p text:style-name="P1"><text:span text:style-name="T1">нормализовать в категорию:</text:span></text:p>
      <text:p text:style-name="P1"><text:span text:style-name="T1"/></text:p>
      <text:p text:style-name="P1"><text:span text:style-name="T1">Упаковка</text:span></text:p>
      <text:p text:style-name="P1"><text:span text:style-name="T1"/></text:p>
      <text:p text:style-name="P1"><text:span text:style-name="T1">Если встречается доставка:</text:span></text:p>
      <text:p text:style-name="P1"><text:soft-page-break/><text:span text:style-name="T1"/></text:p>
      <text:p text:style-name="P1"><text:span text:style-name="T1">— Доставка</text:span></text:p>
      <text:p text:style-name="P1"><text:span text:style-name="T1">— Курьер</text:span></text:p>
      <text:p text:style-name="P1"><text:span text:style-name="T1">— Такси</text:span></text:p>
      <text:p text:style-name="P1"><text:span text:style-name="T1">— Перевозка</text:span></text:p>
      <text:p text:style-name="P1"><text:span text:style-name="T1"/></text:p>
      <text:p text:style-name="P1"><text:span text:style-name="T1">нормализовать в категорию:</text:span></text:p>
      <text:p text:style-name="P1"><text:span text:style-name="T1"/></text:p>
      <text:p text:style-name="P1"><text:span text:style-name="T1">Доставка</text:span></text:p>
      <text:p text:style-name="P1"><text:span text:style-name="T1"/></text:p>
      <text:p text:style-name="P1"><text:span text:style-name="T1">----------------------------------------------------</text:span></text:p>
      <text:p text:style-name="P1"><text:span text:style-name="T1">11. ПОРЯДОК КАТЕГОРИЙ ПОСЛЕ ИМПОРТА</text:span></text:p>
      <text:p text:style-name="P1"><text:span text:style-name="T1">----------------------------------------------------</text:span></text:p>
      <text:p text:style-name="P1"><text:span text:style-name="T1"/></text:p>
      <text:p text:style-name="P1"><text:span text:style-name="T1">После импорта категории отображать в утвержденном порядке:</text:span></text:p>
      <text:p text:style-name="P1"><text:span text:style-name="T1"/></text:p>
      <text:p text:style-name="P1"><text:span text:style-name="T1">1. Фото и оформление рецепта</text:span></text:p>
      <text:p text:style-name="P1"><text:span text:style-name="T1">2. Бисквит</text:span></text:p>
      <text:p text:style-name="P1"><text:span text:style-name="T1">3. Шоколадный бисквит</text:span></text:p>
      <text:p text:style-name="P1"><text:span text:style-name="T1">4. Коржи</text:span></text:p>
      <text:p text:style-name="P1"><text:span text:style-name="T1">5. Сабле / Песочное тесто</text:span></text:p>
      <text:p text:style-name="P1"><text:span text:style-name="T1">6. Безе</text:span></text:p>
      <text:p text:style-name="P1"><text:span text:style-name="T1">7. Печенье</text:span></text:p>
      <text:p text:style-name="P1"><text:span text:style-name="T1">8. Макаронс</text:span></text:p>
      <text:p text:style-name="P1"><text:span text:style-name="T1">9. Блинчики</text:span></text:p>
      <text:p text:style-name="P1"><text:span text:style-name="T1">10. Оладьи</text:span></text:p>
      <text:p text:style-name="P1"><text:span text:style-name="T1">11. Вафли</text:span></text:p>
      <text:p text:style-name="P1"><text:span text:style-name="T1">12. Пончики</text:span></text:p>
      <text:p text:style-name="P1"><text:span text:style-name="T1">13. Кексы / Капкейки</text:span></text:p>
      <text:p text:style-name="P1"><text:span text:style-name="T1">14. Эклеры / Заварные</text:span></text:p>
      <text:p text:style-name="P1"><text:span text:style-name="T1">15. Тарт / Тарталетки</text:span></text:p>
      <text:p text:style-name="P1"><text:span text:style-name="T1">16. Слойка</text:span></text:p>
      <text:p text:style-name="P1"><text:span text:style-name="T1">17. Брауни</text:span></text:p>
      <text:p text:style-name="P1"><text:span text:style-name="T1">18. Чизкейк</text:span></text:p>
      <text:p text:style-name="P1"><text:span text:style-name="T1">19. Основа чизкейка</text:span></text:p>
      <text:p text:style-name="P1"><text:span text:style-name="T1">20. Пряники</text:span></text:p>
      <text:p text:style-name="P1"><text:span text:style-name="T1">21. Меренговый рулет</text:span></text:p>
      <text:p text:style-name="P1"><text:span text:style-name="T1">22. Синнабоны / Булочки</text:span></text:p>
      <text:p text:style-name="P1"><text:span text:style-name="T1">23. Круассаны</text:span></text:p>
      <text:p text:style-name="P1"><text:span text:style-name="T1">24. Хлеб / Бриошь</text:span></text:p>
      <text:p text:style-name="P1"><text:span text:style-name="T1">25. Крем</text:span></text:p>
      <text:p text:style-name="P1"><text:span text:style-name="T1">26. Мусс</text:span></text:p>
      <text:p text:style-name="P1"><text:span text:style-name="T1">27. Изолирующий крем</text:span></text:p>
      <text:p text:style-name="P1"><text:span text:style-name="T1">28. Ганаш</text:span></text:p>
      <text:p text:style-name="P1"><text:soft-page-break/><text:span text:style-name="T1">29. Меренга</text:span></text:p>
      <text:p text:style-name="P1"><text:span text:style-name="T1">30. Джем</text:span></text:p>
      <text:p text:style-name="P1"><text:span text:style-name="T1">31. Конфи / Компоте</text:span></text:p>
      <text:p text:style-name="P1"><text:span text:style-name="T1">32. Карамель</text:span></text:p>
      <text:p text:style-name="P1"><text:span text:style-name="T1">33. Курд</text:span></text:p>
      <text:p text:style-name="P1"><text:span text:style-name="T1">34. Пралине</text:span></text:p>
      <text:p text:style-name="P1"><text:span text:style-name="T1">35. Кремю</text:span></text:p>
      <text:p text:style-name="P1"><text:span text:style-name="T1">36. Намелака</text:span></text:p>
      <text:p text:style-name="P1"><text:span text:style-name="T1">37. Суфле</text:span></text:p>
      <text:p text:style-name="P1"><text:span text:style-name="T1">38. Чизкейк масса</text:span></text:p>
      <text:p text:style-name="P1"><text:span text:style-name="T1">39. Паста / Крем-паста</text:span></text:p>
      <text:p text:style-name="P1"><text:span text:style-name="T1">40. Хрустящий слой / Кранч</text:span></text:p>
      <text:p text:style-name="P1"><text:span text:style-name="T1">41. Ягодная вставка</text:span></text:p>
      <text:p text:style-name="P1"><text:span text:style-name="T1">42. Ореховая масса</text:span></text:p>
      <text:p text:style-name="P1"><text:span text:style-name="T1">43. Зефир</text:span></text:p>
      <text:p text:style-name="P1"><text:span text:style-name="T1">44. Мармелад</text:span></text:p>
      <text:p text:style-name="P1"><text:span text:style-name="T1">45. Желе</text:span></text:p>
      <text:p text:style-name="P1"><text:span text:style-name="T1">46. Глазурь</text:span></text:p>
      <text:p text:style-name="P1"><text:span text:style-name="T1">47. Велюр</text:span></text:p>
      <text:p text:style-name="P1"><text:span text:style-name="T1">48. Гель</text:span></text:p>
      <text:p text:style-name="P1"><text:span text:style-name="T1">49. Заморозка / Вставка</text:span></text:p>
      <text:p text:style-name="P1"><text:span text:style-name="T1">50. Пропитка</text:span></text:p>
      <text:p text:style-name="P1"><text:span text:style-name="T1">51. Отдушка</text:span></text:p>
      <text:p text:style-name="P1"><text:span text:style-name="T1">52. Сиропы</text:span></text:p>
      <text:p text:style-name="P1"><text:span text:style-name="T1">53. Экстракты</text:span></text:p>
      <text:p text:style-name="P1"><text:span text:style-name="T1">54. Алкоголь</text:span></text:p>
      <text:p text:style-name="P1"><text:span text:style-name="T1">55. Красители</text:span></text:p>
      <text:p text:style-name="P1"><text:span text:style-name="T1">56. Кандурин / Блёстки</text:span></text:p>
      <text:p text:style-name="P1"><text:span text:style-name="T1">57. Шоколад</text:span></text:p>
      <text:p text:style-name="P1"><text:span text:style-name="T1">58. Конфеты</text:span></text:p>
      <text:p text:style-name="P1"><text:span text:style-name="T1">59. Корпусные изделия</text:span></text:p>
      <text:p text:style-name="P1"><text:span text:style-name="T1">60. Темперирование</text:span></text:p>
      <text:p text:style-name="P1"><text:span text:style-name="T1">61. Инструменты</text:span></text:p>
      <text:p text:style-name="P1"><text:span text:style-name="T1">62. Декор</text:span></text:p>
      <text:p text:style-name="P1"><text:span text:style-name="T1">63. Упаковка</text:span></text:p>
      <text:p text:style-name="P1"><text:span text:style-name="T1">64. Доставка</text:span></text:p>
      <text:p text:style-name="P1"><text:span text:style-name="T1"/></text:p>
      <text:p text:style-name="P1"><text:span text:style-name="T1">Категории, которых нет в утвержденном списке, но которые импортированы из Excel как производственные, можно добавить после ближайшей смысловой группы.</text:span></text:p>
      <text:p text:style-name="P1"><text:span text:style-name="T1"/></text:p>
      <text:p text:style-name="P1"><text:span text:style-name="T1">Но служебные подкатегории типа «ягоды», «коробки», «насадки» отдельными категориями не создавать.</text:span></text:p>
      <text:p text:style-name="P1"><text:span text:style-name="T1"/></text:p>
      <text:p text:style-name="P1"><text:soft-page-break/><text:span text:style-name="T1">----------------------------------------------------</text:span></text:p>
      <text:p text:style-name="P1"><text:span text:style-name="T1">12. ВЕС ПОСЛЕ ИМПОРТА РЕЦЕПТА</text:span></text:p>
      <text:p text:style-name="P1"><text:span text:style-name="T1">----------------------------------------------------</text:span></text:p>
      <text:p text:style-name="P1"><text:span text:style-name="T1"/></text:p>
      <text:p text:style-name="P1"><text:span text:style-name="T1">После импорта рецепта рассчитать initialBaseWeight.</text:span></text:p>
      <text:p text:style-name="P1"><text:span text:style-name="T1"/></text:p>
      <text:p text:style-name="P1"><text:span text:style-name="T1">initialBaseWeight = сумма baseAmount всех ингредиентов, кроме категорий:</text:span></text:p>
      <text:p text:style-name="P1"><text:span text:style-name="T1"/></text:p>
      <text:p text:style-name="P1"><text:span text:style-name="T1">— Упаковка</text:span></text:p>
      <text:p text:style-name="P1"><text:span text:style-name="T1">— Доставка</text:span></text:p>
      <text:p text:style-name="P1"><text:span text:style-name="T1"/></text:p>
      <text:p text:style-name="P1"><text:span text:style-name="T1">Ганаш включать в вес, если это часть изделия.</text:span></text:p>
      <text:p text:style-name="P1"><text:span text:style-name="T1"/></text:p>
      <text:p text:style-name="P1"><text:span text:style-name="T1">Упаковку и доставку не включать в вес.</text:span></text:p>
      <text:p text:style-name="P1"><text:span text:style-name="T1"/></text:p>
      <text:p text:style-name="P1"><text:span text:style-name="T1">Если в Excel указан исходный вес рецепта отдельно, можно использовать его как desiredWeight/baseWeight, но нельзя затирать корректно рассчитанную рецептурную сумму без проверки.</text:span></text:p>
      <text:p text:style-name="P1"><text:span text:style-name="T1"/></text:p>
      <text:p text:style-name="P1"><text:span text:style-name="T1">----------------------------------------------------</text:span></text:p>
      <text:p text:style-name="P1"><text:span text:style-name="T1">13. СЕБЕСТОИМОСТЬ ПОСЛЕ ИМПОРТА</text:span></text:p>
      <text:p text:style-name="P1"><text:span text:style-name="T1">----------------------------------------------------</text:span></text:p>
      <text:p text:style-name="P1"><text:span text:style-name="T1"/></text:p>
      <text:p text:style-name="P1"><text:span text:style-name="T1">После импорта рецепта:</text:span></text:p>
      <text:p text:style-name="P1"><text:span text:style-name="T1"/></text:p>
      <text:p text:style-name="P1"><text:span text:style-name="T1">— сопоставить ингредиенты с базой по name;</text:span></text:p>
      <text:p text:style-name="P1"><text:span text:style-name="T1">— подтянуть unitPrice;</text:span></text:p>
      <text:p text:style-name="P1"><text:span text:style-name="T1">— посчитать себестоимость;</text:span></text:p>
      <text:p text:style-name="P1"><text:span text:style-name="T1">— показать ингредиенты без цены;</text:span></text:p>
      <text:p text:style-name="P1"><text:span text:style-name="T1">— не добавлять отсутствующие ингредиенты в базу автоматически.</text:span></text:p>
      <text:p text:style-name="P1"><text:span text:style-name="T1"/></text:p>
      <text:p text:style-name="P1"><text:span text:style-name="T1">Если ингредиент отсутствует в базе:</text:span></text:p>
      <text:p text:style-name="P1"><text:span text:style-name="T1"/></text:p>
      <text:p text:style-name="P1"><text:span text:style-name="T1">cost = 0</text:span></text:p>
      <text:p text:style-name="P1"><text:span text:style-name="T1"/></text:p>
      <text:p text:style-name="P1"><text:span text:style-name="T1">и строка подсвечивается как missing price.</text:span></text:p>
      <text:p text:style-name="P1"><text:span text:style-name="T1"/></text:p>
      <text:p text:style-name="P1"><text:span text:style-name="T1">----------------------------------------------------</text:span></text:p>
      <text:p text:style-name="P1"><text:span text:style-name="T1">14. ИКОНКИ ПОСЛЕ ИМПОРТА</text:span></text:p>
      <text:p text:style-name="P1"><text:span text:style-name="T1">----------------------------------------------------</text:span></text:p>
      <text:p text:style-name="P1"><text:span text:style-name="T1"/></text:p>
      <text:p text:style-name="P1"><text:span text:style-name="T1">Каждая импортированная категория должна получить иконку через getCategoryIcon(categoryName).</text:span></text:p>
      <text:p text:style-name="P1"><text:soft-page-break/><text:span text:style-name="T1"/></text:p>
      <text:p text:style-name="P1"><text:span text:style-name="T1">Если точного совпадения нет:</text:span></text:p>
      <text:p text:style-name="P1"><text:span text:style-name="T1">— использовать мягкую нормализацию;</text:span></text:p>
      <text:p text:style-name="P1"><text:span text:style-name="T1">— подобрать иконку по смысловому ключу.</text:span></text:p>
      <text:p text:style-name="P1"><text:span text:style-name="T1"/></text:p>
      <text:p text:style-name="P1"><text:span text:style-name="T1">Примеры:</text:span></text:p>
      <text:p text:style-name="P1"><text:span text:style-name="T1"/></text:p>
      <text:p text:style-name="P1"><text:span text:style-name="T1">Банановый мусс → Мусс</text:span></text:p>
      <text:p text:style-name="P1"><text:span text:style-name="T1">Шоколадный ганаш → Ганаш</text:span></text:p>
      <text:p text:style-name="P1"><text:span text:style-name="T1">Малиновый джем → Джем</text:span></text:p>
      <text:p text:style-name="P1"><text:span text:style-name="T1">Клубничная вставка → Ягодная вставка</text:span></text:p>
      <text:p text:style-name="P1"><text:span text:style-name="T1">Коробки → Упаковка</text:span></text:p>
      <text:p text:style-name="P1"><text:span text:style-name="T1">Ягоды → Декор</text:span></text:p>
      <text:p text:style-name="P1"><text:span text:style-name="T1">Насадки → Инструменты</text:span></text:p>
      <text:p text:style-name="P1"><text:span text:style-name="T1"/></text:p>
      <text:p text:style-name="P1"><text:span text:style-name="T1">Если совпадение не найдено:</text:span></text:p>
      <text:p text:style-name="P1"><text:span text:style-name="T1"/></text:p>
      <text:p text:style-name="P1"><text:span text:style-name="T1">categoryIconMap["default"]</text:span></text:p>
      <text:p text:style-name="P1"><text:span text:style-name="T1"/></text:p>
      <text:p text:style-name="P1"><text:span text:style-name="T1">или безопасный пустой placeholder.</text:span></text:p>
      <text:p text:style-name="P1"><text:span text:style-name="T1"/></text:p>
      <text:p text:style-name="P1"><text:span text:style-name="T1">----------------------------------------------------</text:span></text:p>
      <text:p text:style-name="P1"><text:span text:style-name="T1">15. СОХРАНЕНИЕ ПОСЛЕ ИМПОРТА</text:span></text:p>
      <text:p text:style-name="P1"><text:span text:style-name="T1">----------------------------------------------------</text:span></text:p>
      <text:p text:style-name="P1"><text:span text:style-name="T1"/></text:p>
      <text:p text:style-name="P1"><text:span text:style-name="T1">После импорта рецепта:</text:span></text:p>
      <text:p text:style-name="P1"><text:span text:style-name="T1"/></text:p>
      <text:p text:style-name="P1"><text:span text:style-name="T1">— создать новый рецепт или обновить текущий, если пользователь выбрал обновление;</text:span></text:p>
      <text:p text:style-name="P1"><text:span text:style-name="T1">— сохранить baseAmount как исходные количества;</text:span></text:p>
      <text:p text:style-name="P1"><text:span text:style-name="T1">— amount рассчитать отдельно;</text:span></text:p>
      <text:p text:style-name="P1"><text:span text:style-name="T1">— сохранить technologies;</text:span></text:p>
      <text:p text:style-name="P1"><text:span text:style-name="T1">— сохранить assembly;</text:span></text:p>
      <text:p text:style-name="P1"><text:span text:style-name="T1">— сохранить desiredWeight;</text:span></text:p>
      <text:p text:style-name="P1"><text:span text:style-name="T1">— сохранить initialBaseWeight;</text:span></text:p>
      <text:p text:style-name="P1"><text:span text:style-name="T1">— сохранить категории;</text:span></text:p>
      <text:p text:style-name="P1"><text:span text:style-name="T1">— сохранить сопоставления ingredientId;</text:span></text:p>
      <text:p text:style-name="P1"><text:span text:style-name="T1">— сохранить в localStorage.</text:span></text:p>
      <text:p text:style-name="P1"><text:span text:style-name="T1"/></text:p>
      <text:p text:style-name="P1"><text:span text:style-name="T1">Не сохранять пересчитанные amount как baseAmount.</text:span></text:p>
      <text:p text:style-name="P1"><text:span text:style-name="T1"/></text:p>
      <text:p text:style-name="P1"><text:span text:style-name="T1">----------------------------------------------------</text:span></text:p>
      <text:p text:style-name="P1"><text:span text:style-name="T1">16. ПРОВЕРКА ИМПОРТА</text:span></text:p>
      <text:p text:style-name="P1"><text:span text:style-name="T1">----------------------------------------------------</text:span></text:p>
      <text:p text:style-name="P1"><text:soft-page-break/><text:span text:style-name="T1"/></text:p>
      <text:p text:style-name="P1"><text:span text:style-name="T1">После реализации импорта проверить:</text:span></text:p>
      <text:p text:style-name="P1"><text:span text:style-name="T1"/></text:p>
      <text:p text:style-name="P1"><text:span text:style-name="T1">1. База ингредиентов импортируется.</text:span></text:p>
      <text:p text:style-name="P1"><text:span text:style-name="T1">2. Дубли базы не создаются.</text:span></text:p>
      <text:p text:style-name="P1"><text:span text:style-name="T1">3. Существующие ингредиенты обновляются.</text:span></text:p>
      <text:p text:style-name="P1"><text:span text:style-name="T1">4. Цена за грамм считается.</text:span></text:p>
      <text:p text:style-name="P1"><text:span text:style-name="T1">5. Дата цены обновляется.</text:span></text:p>
      <text:p text:style-name="P1"><text:span text:style-name="T1">6. Поиск дублей идет только по name.</text:span></text:p>
      <text:p text:style-name="P1"><text:span text:style-name="T1">7. Рецепт импортируется.</text:span></text:p>
      <text:p text:style-name="P1"><text:span text:style-name="T1">8. Категории определяются.</text:span></text:p>
      <text:p text:style-name="P1"><text:span text:style-name="T1">9. Ингредиенты попадают в правильные категории.</text:span></text:p>
      <text:p text:style-name="P1"><text:span text:style-name="T1">10. Количества читаются.</text:span></text:p>
      <text:p text:style-name="P1"><text:span text:style-name="T1">11. Единицы читаются или подтягиваются из базы.</text:span></text:p>
      <text:p text:style-name="P1"><text:span text:style-name="T1">12. Ингредиенты рецепта не добавляются в базу автоматически.</text:span></text:p>
      <text:p text:style-name="P1"><text:span text:style-name="T1">13. Отсутствующие ингредиенты подсвечиваются.</text:span></text:p>
      <text:p text:style-name="P1"><text:span text:style-name="T1">14. Технологии попадают в свои категории.</text:span></text:p>
      <text:p text:style-name="P1"><text:span text:style-name="T1">15. Сборка попадает в поле assembly.</text:span></text:p>
      <text:p text:style-name="P1"><text:span text:style-name="T1">16. Сборка не становится категорией.</text:span></text:p>
      <text:p text:style-name="P1"><text:span text:style-name="T1">17. Сборка не попадает в технологию.</text:span></text:p>
      <text:p text:style-name="P1"><text:span text:style-name="T1">18. Упаковка не входит в вес.</text:span></text:p>
      <text:p text:style-name="P1"><text:span text:style-name="T1">19. Доставка не входит в вес.</text:span></text:p>
      <text:p text:style-name="P1"><text:span text:style-name="T1">20. initialBaseWeight считается корректно.</text:span></text:p>
      <text:p text:style-name="P1"><text:span text:style-name="T1">21. Себестоимость пересчитывается после импорта.</text:span></text:p>
      <text:p text:style-name="P1"><text:span text:style-name="T1">22. Иконки категорий отображаются после импорта.</text:span></text:p>
      <text:p text:style-name="P1"><text:span text:style-name="T1">23. Подкатегории декора/инструментов/упаковки не создаются как отдельные категории.</text:span></text:p>
      <text:p text:style-name="P1"><text:span text:style-name="T1">24. Печатные формы после импорта работают.</text:span></text:p>
      <text:p text:style-name="P1"><text:span text:style-name="T1">25. В консоли нет ошибок. ==================================================== КНОПКИ ==================================================== Обязательные кнопки: — Сохранить рецепт — Редактировать рецепт — Удалить рецепт — Свернуть все — Развернуть все — Добавить ингредиент — Импорт базы из Excel — Импорт рецепта из Excel — Печать закупки — Печать техкарты — Себестоимость — Сохранить рецепт в PDF — Настройки Кнопки должны быть в premium 3D/neumorphism стиле. ==================================================== КАРУСЕЛЬ РЕЦЕПТОВ ==================================================== Вверху приложения: — карусель рецептов; — карточки рецептов; — фото, если есть; — название рецепта; — мягкая анимация; — hover-эффект; — клик открывает рецепт. При наведении анимация может </text:span><text:soft-page-break/><text:span text:style-name="T1">останавливаться. ==================================================== ПОИСК РЕЦЕПТОВ ==================================================== Поиск по рецептам: — искать по названию; — показывать карточки результата; — миниатюра; — название; — дата; — вес. ==================================================== НАСТРОЙКИ ==================================================== Добавить панель настроек. Настройки: — светлая тема; — темная тема; — пользовательская тема; — фоновое изображение; — прозрачность подложки; — цвет акцента; — логотип для печати; — размер логотипа; — прозрачность логотипа; — положение логотипа X/Y; — предпросмотр логотипа на листе. Настройки сохранять в localStorage. ==================================================== UI STYLE ==================================================== Стиль: — premium pastry UI; — luxury cookbook; — cream / pearl palette; — soft gold accents; — soft neumorphism; — 3D buttons; — rounded cards; — gentle shadows; — glass panels; — мягкий кондитерский стиль. Основные визуальные правила: — border-radius 24–32px; — тёплый фон; — полупрозрачные панели; — мягкие внутренние тени; — кнопки с градиентом; — hover-анимации; — без кислотных цветов; — без плоского дешевого UI.</text:span></text:p>
      <text:p text:style-name="P1"><text:span text:style-name="T1"/></text:p>
      <text:p text:style-name="P1"><text:span text:style-name="T1">====================================================</text:span></text:p>
      <text:p text:style-name="P1"><text:span text:style-name="T1">ПОДРОБНАЯ ВИЗУАЛЬНАЯ СИСТЕМА / UI-КИТ</text:span></text:p>
      <text:p text:style-name="P1"><text:span text:style-name="T1">====================================================</text:span></text:p>
      <text:p text:style-name="P1"><text:span text:style-name="T1"/></text:p>
      <text:p text:style-name="P1"><text:span text:style-name="T1">Интерфейс приложения должен выглядеть как premium pastry cookbook / luxury confectionery calculator.</text:span></text:p>
      <text:p text:style-name="P1"><text:span text:style-name="T1"/></text:p>
      <text:p text:style-name="P1"><text:span text:style-name="T1">Общее ощущение:</text:span></text:p>
      <text:p text:style-name="P1"><text:span text:style-name="T1">— дорогая кондитерская;</text:span></text:p>
      <text:p text:style-name="P1"><text:span text:style-name="T1">— кремово-жемчужная палитра;</text:span></text:p>
      <text:p text:style-name="P1"><text:span text:style-name="T1">— мягкое золото;</text:span></text:p>
      <text:p text:style-name="P1"><text:span text:style-name="T1">— шелковистая фактура;</text:span></text:p>
      <text:p text:style-name="P1"><text:span text:style-name="T1">— тёплый свет;</text:span></text:p>
      <text:p text:style-name="P1"><text:span text:style-name="T1">— воздушные стеклянные панели;</text:span></text:p>
      <text:p text:style-name="P1"><text:span text:style-name="T1">— soft neumorphism;</text:span></text:p>
      <text:p text:style-name="P1"><text:span text:style-name="T1">— 3D-кнопки;</text:span></text:p>
      <text:p text:style-name="P1"><text:span text:style-name="T1">— аккуратная глубина;</text:span></text:p>
      <text:p text:style-name="P1"><text:span text:style-name="T1">— без плоского дешевого UI.</text:span></text:p>
      <text:p text:style-name="P1"><text:soft-page-break/><text:span text:style-name="T1"/></text:p>
      <text:p text:style-name="P1"><text:span text:style-name="T1">----------------------------------------------------</text:span></text:p>
      <text:p text:style-name="P1"><text:span text:style-name="T1">ШРИФТЫ ИНТЕРФЕЙСА</text:span></text:p>
      <text:p text:style-name="P1"><text:span text:style-name="T1">----------------------------------------------------</text:span></text:p>
      <text:p text:style-name="P1"><text:span text:style-name="T1"/></text:p>
      <text:p text:style-name="P1"><text:span text:style-name="T1">Основной экранный шрифт:</text:span></text:p>
      <text:p text:style-name="P1"><text:span text:style-name="T1"/></text:p>
      <text:p text:style-name="P1"><text:span text:style-name="T1">Arial, system-ui, -apple-system, BlinkMacSystemFont, "Segoe UI", sans-serif</text:span></text:p>
      <text:p text:style-name="P1"><text:span text:style-name="T1"/></text:p>
      <text:p text:style-name="P1"><text:span text:style-name="T1">Текст должен быть:</text:span></text:p>
      <text:p text:style-name="P1"><text:span text:style-name="T1">— хорошо читаемый;</text:span></text:p>
      <text:p text:style-name="P1"><text:span text:style-name="T1">— не слишком тонкий;</text:span></text:p>
      <text:p text:style-name="P1"><text:span text:style-name="T1">— мягкий по восприятию;</text:span></text:p>
      <text:p text:style-name="P1"><text:span text:style-name="T1">— без декоративных шрифтов в рабочих таблицах.</text:span></text:p>
      <text:p text:style-name="P1"><text:span text:style-name="T1"/></text:p>
      <text:p text:style-name="P1"><text:span text:style-name="T1">Рекомендуемые размеры:</text:span></text:p>
      <text:p text:style-name="P1"><text:span text:style-name="T1"/></text:p>
      <text:p text:style-name="P1"><text:span text:style-name="T1">body:</text:span></text:p>
      <text:p text:style-name="P1"><text:span text:style-name="T1">font-size: 15px;</text:span></text:p>
      <text:p text:style-name="P1"><text:span text:style-name="T1">line-height: 1.35;</text:span></text:p>
      <text:p text:style-name="P1"><text:span text:style-name="T1"/></text:p>
      <text:p text:style-name="P1"><text:span text:style-name="T1">h1:</text:span></text:p>
      <text:p text:style-name="P1"><text:span text:style-name="T1">font-size: 34–40px;</text:span></text:p>
      <text:p text:style-name="P1"><text:span text:style-name="T1">font-weight: 800;</text:span></text:p>
      <text:p text:style-name="P1"><text:span text:style-name="T1"/></text:p>
      <text:p text:style-name="P1"><text:span text:style-name="T1">h2:</text:span></text:p>
      <text:p text:style-name="P1"><text:span text:style-name="T1">font-size: 26–30px;</text:span></text:p>
      <text:p text:style-name="P1"><text:span text:style-name="T1">font-weight: 800;</text:span></text:p>
      <text:p text:style-name="P1"><text:span text:style-name="T1"/></text:p>
      <text:p text:style-name="P1"><text:span text:style-name="T1">h3:</text:span></text:p>
      <text:p text:style-name="P1"><text:span text:style-name="T1">font-size: 18–22px;</text:span></text:p>
      <text:p text:style-name="P1"><text:span text:style-name="T1">font-weight: 700;</text:span></text:p>
      <text:p text:style-name="P1"><text:span text:style-name="T1"/></text:p>
      <text:p text:style-name="P1"><text:span text:style-name="T1">label:</text:span></text:p>
      <text:p text:style-name="P1"><text:span text:style-name="T1">font-size: 12–13px;</text:span></text:p>
      <text:p text:style-name="P1"><text:span text:style-name="T1">font-weight: 600;</text:span></text:p>
      <text:p text:style-name="P1"><text:span text:style-name="T1">color: muted;</text:span></text:p>
      <text:p text:style-name="P1"><text:span text:style-name="T1"/></text:p>
      <text:p text:style-name="P1"><text:span text:style-name="T1">table:</text:span></text:p>
      <text:p text:style-name="P1"><text:span text:style-name="T1">font-size: 13–14px;</text:span></text:p>
      <text:p text:style-name="P1"><text:span text:style-name="T1"/></text:p>
      <text:p text:style-name="P1"><text:span text:style-name="T1">input/select/textarea:</text:span></text:p>
      <text:p text:style-name="P1"><text:span text:style-name="T1">font-size: 14–15px;</text:span></text:p>
      <text:p text:style-name="P1"><text:soft-page-break/><text:span text:style-name="T1"/></text:p>
      <text:p text:style-name="P1"><text:span text:style-name="T1">Кнопки:</text:span></text:p>
      <text:p text:style-name="P1"><text:span text:style-name="T1">font-size: 14–15px;</text:span></text:p>
      <text:p text:style-name="P1"><text:span text:style-name="T1">font-weight: 700;</text:span></text:p>
      <text:p text:style-name="P1"><text:span text:style-name="T1"/></text:p>
      <text:p text:style-name="P1"><text:span text:style-name="T1">----------------------------------------------------</text:span></text:p>
      <text:p text:style-name="P1"><text:span text:style-name="T1">ШРИФТЫ ДЛЯ ПЕЧАТНЫХ ФОРМ</text:span></text:p>
      <text:p text:style-name="P1"><text:span text:style-name="T1">----------------------------------------------------</text:span></text:p>
      <text:p text:style-name="P1"><text:span text:style-name="T1"/></text:p>
      <text:p text:style-name="P1"><text:span text:style-name="T1">Для печатных форм использовать:</text:span></text:p>
      <text:p text:style-name="P1"><text:span text:style-name="T1"/></text:p>
      <text:p text:style-name="P1"><text:span text:style-name="T1">Times New Roman, Times, serif</text:span></text:p>
      <text:p text:style-name="P1"><text:span text:style-name="T1"/></text:p>
      <text:p text:style-name="P1"><text:span text:style-name="T1">Это относится к:</text:span></text:p>
      <text:p text:style-name="P1"><text:span text:style-name="T1">— техкарте;</text:span></text:p>
      <text:p text:style-name="P1"><text:span text:style-name="T1">— закупке;</text:span></text:p>
      <text:p text:style-name="P1"><text:span text:style-name="T1">— себестоимости;</text:span></text:p>
      <text:p text:style-name="P1"><text:span text:style-name="T1">— печатным документам.</text:span></text:p>
      <text:p text:style-name="P1"><text:span text:style-name="T1"/></text:p>
      <text:p text:style-name="P1"><text:span text:style-name="T1">Параметры печати:</text:span></text:p>
      <text:p text:style-name="P1"><text:span text:style-name="T1"/></text:p>
      <text:p text:style-name="P1"><text:span text:style-name="T1">основной текст:</text:span></text:p>
      <text:p text:style-name="P1"><text:span text:style-name="T1">font-size: 9–11pt;</text:span></text:p>
      <text:p text:style-name="P1"><text:span text:style-name="T1">line-height: 1.0;</text:span></text:p>
      <text:p text:style-name="P1"><text:span text:style-name="T1"/></text:p>
      <text:p text:style-name="P1"><text:span text:style-name="T1">заголовок рецепта:</text:span></text:p>
      <text:p text:style-name="P1"><text:span text:style-name="T1">font-size: 16–20pt;</text:span></text:p>
      <text:p text:style-name="P1"><text:span text:style-name="T1">font-weight: bold;</text:span></text:p>
      <text:p text:style-name="P1"><text:span text:style-name="T1"/></text:p>
      <text:p text:style-name="P1"><text:span text:style-name="T1">«ТЕХНОЛОГИЧЕСКАЯ КАРТА»:</text:span></text:p>
      <text:p text:style-name="P1"><text:span text:style-name="T1">font-size меньше названия примерно в 2–3 раза;</text:span></text:p>
      <text:p text:style-name="P1"><text:span text:style-name="T1">font-weight: normal;</text:span></text:p>
      <text:p text:style-name="P1"><text:span text:style-name="T1"/></text:p>
      <text:p text:style-name="P1"><text:span text:style-name="T1">Убрать лишние paragraph spacing:</text:span></text:p>
      <text:p text:style-name="P1"><text:span text:style-name="T1">margin-before: 0;</text:span></text:p>
      <text:p text:style-name="P1"><text:span text:style-name="T1">margin-after: 0;</text:span></text:p>
      <text:p text:style-name="P1"><text:span text:style-name="T1"/></text:p>
      <text:p text:style-name="P1"><text:span text:style-name="T1">----------------------------------------------------</text:span></text:p>
      <text:p text:style-name="P1"><text:span text:style-name="T1">ЦВЕТОВАЯ ПАЛИТРА</text:span></text:p>
      <text:p text:style-name="P1"><text:span text:style-name="T1">----------------------------------------------------</text:span></text:p>
      <text:p text:style-name="P1"><text:span text:style-name="T1"/></text:p>
      <text:p text:style-name="P1"><text:span text:style-name="T1">Использовать CSS variables.</text:span></text:p>
      <text:p text:style-name="P1"><text:span text:style-name="T1"/></text:p>
      <text:p text:style-name="P1"><text:span text:style-name="T1">Основная светлая тема:</text:span></text:p>
      <text:p text:style-name="P1"><text:soft-page-break/><text:span text:style-name="T1"/></text:p>
      <text:p text:style-name="P1"><text:span text:style-name="T1">--bg: #f5efe6;</text:span></text:p>
      <text:p text:style-name="P1"><text:span text:style-name="T1">--bg2: #ebe1d2;</text:span></text:p>
      <text:p text:style-name="P1"><text:span text:style-name="T1">--card: rgba(255,255,255,.32);</text:span></text:p>
      <text:p text:style-name="P1"><text:span text:style-name="T1">--text: #4b4036;</text:span></text:p>
      <text:p text:style-name="P1"><text:span text:style-name="T1">--muted: #75695f;</text:span></text:p>
      <text:p text:style-name="P1"><text:span text:style-name="T1">--line: rgba(135,115,95,.25);</text:span></text:p>
      <text:p text:style-name="P1"><text:span text:style-name="T1">--input: #f7f0e5;</text:span></text:p>
      <text:p text:style-name="P1"><text:span text:style-name="T1">--accent: #d9ab58;</text:span></text:p>
      <text:p text:style-name="P1"><text:span text:style-name="T1">--accent2: #b98536;</text:span></text:p>
      <text:p text:style-name="P1"><text:span text:style-name="T1">--accentText: #4b3316;</text:span></text:p>
      <text:p text:style-name="P1"><text:span text:style-name="T1"/></text:p>
      <text:p text:style-name="P1"><text:span text:style-name="T1">Дополнительные мягкие акценты:</text:span></text:p>
      <text:p text:style-name="P1"><text:span text:style-name="T1"/></text:p>
      <text:p text:style-name="P1"><text:span text:style-name="T1">--green1: #cfe4c7;</text:span></text:p>
      <text:p text:style-name="P1"><text:span text:style-name="T1">--green2: #9fbe93;</text:span></text:p>
      <text:p text:style-name="P1"><text:span text:style-name="T1">--mint1: #cfe0c9;</text:span></text:p>
      <text:p text:style-name="P1"><text:span text:style-name="T1">--mint2: #9eb79b;</text:span></text:p>
      <text:p text:style-name="P1"><text:span text:style-name="T1">--red1: #f5b8a9;</text:span></text:p>
      <text:p text:style-name="P1"><text:span text:style-name="T1">--red2: #de8574;</text:span></text:p>
      <text:p text:style-name="P1"><text:span text:style-name="T1">--purple1: #d8c6eb;</text:span></text:p>
      <text:p text:style-name="P1"><text:span text:style-name="T1">--purple2: #a685c8;</text:span></text:p>
      <text:p text:style-name="P1"><text:span text:style-name="T1">--blue1: #d1dde8;</text:span></text:p>
      <text:p text:style-name="P1"><text:span text:style-name="T1">--blue2: #91a8bf;</text:span></text:p>
      <text:p text:style-name="P1"><text:span text:style-name="T1">--yellow1: #f4d7a1;</text:span></text:p>
      <text:p text:style-name="P1"><text:span text:style-name="T1">--yellow2: #d9ab58;</text:span></text:p>
      <text:p text:style-name="P1"><text:span text:style-name="T1"/></text:p>
      <text:p text:style-name="P1"><text:span text:style-name="T1">Темная тема:</text:span></text:p>
      <text:p text:style-name="P1"><text:span text:style-name="T1"/></text:p>
      <text:p text:style-name="P1"><text:span text:style-name="T1">--bg: #151b23;</text:span></text:p>
      <text:p text:style-name="P1"><text:span text:style-name="T1">--bg2: #0f141b;</text:span></text:p>
      <text:p text:style-name="P1"><text:span text:style-name="T1">--card: rgba(38,48,60,.78);</text:span></text:p>
      <text:p text:style-name="P1"><text:span text:style-name="T1">--text: #f4eadc;</text:span></text:p>
      <text:p text:style-name="P1"><text:span text:style-name="T1">--muted: #c9bdaa;</text:span></text:p>
      <text:p text:style-name="P1"><text:span text:style-name="T1">--line: rgba(255,255,255,.16);</text:span></text:p>
      <text:p text:style-name="P1"><text:span text:style-name="T1">--input: #202a36;</text:span></text:p>
      <text:p text:style-name="P1"><text:span text:style-name="T1">--accent: #91a8bf;</text:span></text:p>
      <text:p text:style-name="P1"><text:span text:style-name="T1">--accent2: #5f7891;</text:span></text:p>
      <text:p text:style-name="P1"><text:span text:style-name="T1">--accentText: #102234;</text:span></text:p>
      <text:p text:style-name="P1"><text:span text:style-name="T1"/></text:p>
      <text:p text:style-name="P1"><text:span text:style-name="T1">----------------------------------------------------</text:span></text:p>
      <text:p text:style-name="P1"><text:span text:style-name="T1">ФОН И ФАКТУРА</text:span></text:p>
      <text:p text:style-name="P1"><text:span text:style-name="T1">----------------------------------------------------</text:span></text:p>
      <text:p text:style-name="P1"><text:span text:style-name="T1"/></text:p>
      <text:p text:style-name="P1"><text:soft-page-break/><text:span text:style-name="T1">Главный фон приложения должен быть не плоским, а фактурным.</text:span></text:p>
      <text:p text:style-name="P1"><text:span text:style-name="T1"/></text:p>
      <text:p text:style-name="P1"><text:span text:style-name="T1">Эффект:</text:span></text:p>
      <text:p text:style-name="P1"><text:span text:style-name="T1">— теплый кондитерский стол;</text:span></text:p>
      <text:p text:style-name="P1"><text:span text:style-name="T1">— шелково-велюровая / перламутровая фактура;</text:span></text:p>
      <text:p text:style-name="P1"><text:span text:style-name="T1">— мягкий кремовый материал;</text:span></text:p>
      <text:p text:style-name="P1"><text:span text:style-name="T1">— легкие продольные линии;</text:span></text:p>
      <text:p text:style-name="P1"><text:span text:style-name="T1">— едва заметная зернистость;</text:span></text:p>
      <text:p text:style-name="P1"><text:span text:style-name="T1">— деликатные блики;</text:span></text:p>
      <text:p text:style-name="P1"><text:span text:style-name="T1">— без резких волн;</text:span></text:p>
      <text:p text:style-name="P1"><text:span text:style-name="T1">— без грязного шума;</text:span></text:p>
      <text:p text:style-name="P1"><text:span text:style-name="T1">— без контрастной текстуры.</text:span></text:p>
      <text:p text:style-name="P1"><text:span text:style-name="T1"/></text:p>
      <text:p text:style-name="P1"><text:span text:style-name="T1">Рекомендуемый стиль для .table-surface:</text:span></text:p>
      <text:p text:style-name="P1"><text:span text:style-name="T1"/></text:p>
      <text:p text:style-name="P1"><text:span text:style-name="T1">.table-surface {</text:span></text:p>
      <text:p text:style-name="P1"><text:span text:style-name="T1"><text:s text:c="2"/>position: relative;</text:span></text:p>
      <text:p text:style-name="P1"><text:span text:style-name="T1"><text:s text:c="2"/>max-width: 1700px;</text:span></text:p>
      <text:p text:style-name="P1"><text:span text:style-name="T1"><text:s text:c="2"/>min-height: 100vh;</text:span></text:p>
      <text:p text:style-name="P1"><text:span text:style-name="T1"><text:s text:c="2"/>margin: auto;</text:span></text:p>
      <text:p text:style-name="P1"><text:span text:style-name="T1"><text:s text:c="2"/>padding: 40px;</text:span></text:p>
      <text:p text:style-name="P1"><text:span text:style-name="T1"><text:s text:c="2"/>border-radius: 40px;</text:span></text:p>
      <text:p text:style-name="P1"><text:span text:style-name="T1"><text:s text:c="2"/>background:</text:span></text:p>
      <text:p text:style-name="P1"><text:span text:style-name="T1"><text:s text:c="4"/>linear-gradient(90deg, rgba(255,255,255,.08) 0%, rgba(0,0,0,.02) 50%, rgba(255,255,255,.08) 100%),</text:span></text:p>
      <text:p text:style-name="P1"><text:span text:style-name="T1"><text:s text:c="4"/>repeating-linear-gradient(90deg, rgba(255,255,255,.03) 0px, rgba(255,255,255,.03) 2px, transparent 2px, transparent 8px),</text:span></text:p>
      <text:p text:style-name="P1"><text:span text:style-name="T1"><text:s text:c="4"/>linear-gradient(145deg, #efe5d5, #e5d8c5);</text:span></text:p>
      <text:p text:style-name="P1"><text:span text:style-name="T1"><text:s text:c="2"/>box-shadow:</text:span></text:p>
      <text:p text:style-name="P1"><text:span text:style-name="T1"><text:s text:c="4"/>inset 8px 8px 20px rgba(255,255,255,.55),</text:span></text:p>
      <text:p text:style-name="P1"><text:span text:style-name="T1"><text:s text:c="4"/>inset -10px -10px 20px rgba(180,160,140,.15),</text:span></text:p>
      <text:p text:style-name="P1"><text:span text:style-name="T1"><text:s text:c="4"/>0 30px 60px rgba(0,0,0,.08);</text:span></text:p>
      <text:p text:style-name="P1"><text:span text:style-name="T1">}</text:span></text:p>
      <text:p text:style-name="P1"><text:span text:style-name="T1"/></text:p>
      <text:p text:style-name="P1"><text:span text:style-name="T1">Если используется пользовательское фото-фон:</text:span></text:p>
      <text:p text:style-name="P1"><text:span text:style-name="T1">— поверх фото обязательно накладывать мягкий светлый overlay;</text:span></text:p>
      <text:p text:style-name="P1"><text:span text:style-name="T1">— текст должен оставаться читаемым;</text:span></text:p>
      <text:p text:style-name="P1"><text:span text:style-name="T1">— фон не должен спорить с таблицами.</text:span></text:p>
      <text:p text:style-name="P1"><text:span text:style-name="T1"/></text:p>
      <text:p text:style-name="P1"><text:span text:style-name="T1">----------------------------------------------------</text:span></text:p>
      <text:p text:style-name="P1"><text:span text:style-name="T1">ПАНЕЛИ</text:span></text:p>
      <text:p text:style-name="P1"><text:span text:style-name="T1">----------------------------------------------------</text:span></text:p>
      <text:p text:style-name="P1"><text:span text:style-name="T1"/></text:p>
      <text:p text:style-name="P1"><text:span text:style-name="T1">Панели должны быть стеклянно-кремовыми, мягкими, объемными.</text:span></text:p>
      <text:p text:style-name="P1"><text:soft-page-break/><text:span text:style-name="T1"/></text:p>
      <text:p text:style-name="P1"><text:span text:style-name="T1">.panel {</text:span></text:p>
      <text:p text:style-name="P1"><text:span text:style-name="T1"><text:s text:c="2"/>background: rgba(255,255,255,.28);</text:span></text:p>
      <text:p text:style-name="P1"><text:span text:style-name="T1"><text:s text:c="2"/>backdrop-filter: blur(8px);</text:span></text:p>
      <text:p text:style-name="P1"><text:span text:style-name="T1"><text:s text:c="2"/>padding: 24px;</text:span></text:p>
      <text:p text:style-name="P1"><text:span text:style-name="T1"><text:s text:c="2"/>border-radius: 28px;</text:span></text:p>
      <text:p text:style-name="P1"><text:span text:style-name="T1"><text:s text:c="2"/>margin-bottom: 24px;</text:span></text:p>
      <text:p text:style-name="P1"><text:span text:style-name="T1"><text:s text:c="2"/>border: 1px solid var(--line);</text:span></text:p>
      <text:p text:style-name="P1"><text:span text:style-name="T1"><text:s text:c="2"/>box-shadow:</text:span></text:p>
      <text:p text:style-name="P1"><text:span text:style-name="T1"><text:s text:c="4"/>inset 3px 3px 8px rgba(255,255,255,.85),</text:span></text:p>
      <text:p text:style-name="P1"><text:span text:style-name="T1"><text:s text:c="4"/>inset -4px -4px 8px rgba(180,160,140,.15),</text:span></text:p>
      <text:p text:style-name="P1"><text:span text:style-name="T1"><text:s text:c="4"/>0 10px 30px rgba(0,0,0,.05);</text:span></text:p>
      <text:p text:style-name="P1"><text:span text:style-name="T1">}</text:span></text:p>
      <text:p text:style-name="P1"><text:span text:style-name="T1"/></text:p>
      <text:p text:style-name="P1"><text:span text:style-name="T1">Панели не должны быть плоскими белыми карточками.</text:span></text:p>
      <text:p text:style-name="P1"><text:span text:style-name="T1"/></text:p>
      <text:p text:style-name="P1"><text:span text:style-name="T1">----------------------------------------------------</text:span></text:p>
      <text:p text:style-name="P1"><text:span text:style-name="T1">КНОПКИ</text:span></text:p>
      <text:p text:style-name="P1"><text:span text:style-name="T1">----------------------------------------------------</text:span></text:p>
      <text:p text:style-name="P1"><text:span text:style-name="T1"/></text:p>
      <text:p text:style-name="P1"><text:span text:style-name="T1">Кнопки должны быть в стиле soft 3D / neumorphism.</text:span></text:p>
      <text:p text:style-name="P1"><text:span text:style-name="T1"/></text:p>
      <text:p text:style-name="P1"><text:span text:style-name="T1">Общее:</text:span></text:p>
      <text:p text:style-name="P1"><text:span text:style-name="T1">— одинаковая высота;</text:span></text:p>
      <text:p text:style-name="P1"><text:span text:style-name="T1">— скругление 18–22px;</text:span></text:p>
      <text:p text:style-name="P1"><text:span text:style-name="T1">— мягкий градиент;</text:span></text:p>
      <text:p text:style-name="P1"><text:span text:style-name="T1">— внутренняя светлая тень;</text:span></text:p>
      <text:p text:style-name="P1"><text:span text:style-name="T1">— внешняя мягкая тень;</text:span></text:p>
      <text:p text:style-name="P1"><text:span text:style-name="T1">— hover с легким поднятием;</text:span></text:p>
      <text:p text:style-name="P1"><text:span text:style-name="T1">— active с эффектом вдавливания.</text:span></text:p>
      <text:p text:style-name="P1"><text:span text:style-name="T1"/></text:p>
      <text:p text:style-name="P1"><text:span text:style-name="T1">Рекомендуемый CSS:</text:span></text:p>
      <text:p text:style-name="P1"><text:span text:style-name="T1"/></text:p>
      <text:p text:style-name="P1"><text:span text:style-name="T1">button,</text:span></text:p>
      <text:p text:style-name="P1"><text:span text:style-name="T1">.btn {</text:span></text:p>
      <text:p text:style-name="P1"><text:span text:style-name="T1"><text:s text:c="2"/>border: none;</text:span></text:p>
      <text:p text:style-name="P1"><text:span text:style-name="T1"><text:s text:c="2"/>border-radius: 18px;</text:span></text:p>
      <text:p text:style-name="P1"><text:span text:style-name="T1"><text:s text:c="2"/>min-height: 42px;</text:span></text:p>
      <text:p text:style-name="P1"><text:span text:style-name="T1"><text:s text:c="2"/>padding: 10px 16px;</text:span></text:p>
      <text:p text:style-name="P1"><text:span text:style-name="T1"><text:s text:c="2"/>font-weight: 700;</text:span></text:p>
      <text:p text:style-name="P1"><text:span text:style-name="T1"><text:s text:c="2"/>cursor: pointer;</text:span></text:p>
      <text:p text:style-name="P1"><text:span text:style-name="T1"><text:s text:c="2"/>color: var(--accentText);</text:span></text:p>
      <text:p text:style-name="P1"><text:span text:style-name="T1"><text:s text:c="2"/>background: linear-gradient(145deg, var(--yellow1), var(--yellow2));</text:span></text:p>
      <text:p text:style-name="P1"><text:span text:style-name="T1"><text:s text:c="2"/>box-shadow:</text:span></text:p>
      <text:p text:style-name="P1"><text:soft-page-break/><text:span text:style-name="T1"><text:s text:c="4"/>6px 7px 14px rgba(130,110,90,.22),</text:span></text:p>
      <text:p text:style-name="P1"><text:span text:style-name="T1"><text:s text:c="4"/>-4px -4px 10px rgba(255,255,255,.75),</text:span></text:p>
      <text:p text:style-name="P1"><text:span text:style-name="T1"><text:s text:c="4"/>inset 2px 2px 5px rgba(255,255,255,.7),</text:span></text:p>
      <text:p text:style-name="P1"><text:span text:style-name="T1"><text:s text:c="4"/>inset -2px -2px 5px rgba(130,110,90,.12);</text:span></text:p>
      <text:p text:style-name="P1"><text:span text:style-name="T1"><text:s text:c="2"/>transition: transform .18s ease, box-shadow .18s ease, filter .18s ease;</text:span></text:p>
      <text:p text:style-name="P1"><text:span text:style-name="T1">}</text:span></text:p>
      <text:p text:style-name="P1"><text:span text:style-name="T1"/></text:p>
      <text:p text:style-name="P1"><text:span text:style-name="T1">button:hover,</text:span></text:p>
      <text:p text:style-name="P1"><text:span text:style-name="T1">.btn:hover {</text:span></text:p>
      <text:p text:style-name="P1"><text:span text:style-name="T1"><text:s text:c="2"/>transform: translateY(-2px);</text:span></text:p>
      <text:p text:style-name="P1"><text:span text:style-name="T1"><text:s text:c="2"/>filter: brightness(1.03);</text:span></text:p>
      <text:p text:style-name="P1"><text:span text:style-name="T1">}</text:span></text:p>
      <text:p text:style-name="P1"><text:span text:style-name="T1"/></text:p>
      <text:p text:style-name="P1"><text:span text:style-name="T1">button:active,</text:span></text:p>
      <text:p text:style-name="P1"><text:span text:style-name="T1">.btn:active {</text:span></text:p>
      <text:p text:style-name="P1"><text:span text:style-name="T1"><text:s text:c="2"/>transform: translateY(1px);</text:span></text:p>
      <text:p text:style-name="P1"><text:span text:style-name="T1"><text:s text:c="2"/>box-shadow:</text:span></text:p>
      <text:p text:style-name="P1"><text:span text:style-name="T1"><text:s text:c="4"/>inset 4px 4px 8px rgba(130,110,90,.22),</text:span></text:p>
      <text:p text:style-name="P1"><text:span text:style-name="T1"><text:s text:c="4"/>inset -3px -3px 8px rgba(255,255,255,.75);</text:span></text:p>
      <text:p text:style-name="P1"><text:span text:style-name="T1">}</text:span></text:p>
      <text:p text:style-name="P1"><text:span text:style-name="T1"/></text:p>
      <text:p text:style-name="P1"><text:span text:style-name="T1">Цветовые варианты кнопок:</text:span></text:p>
      <text:p text:style-name="P1"><text:span text:style-name="T1">— сохранить / добавить: мягкий зеленый;</text:span></text:p>
      <text:p text:style-name="P1"><text:span text:style-name="T1">— удалить: мягкий красно-розовый;</text:span></text:p>
      <text:p text:style-name="P1"><text:span text:style-name="T1">— печать / PDF: золото;</text:span></text:p>
      <text:p text:style-name="P1"><text:span text:style-name="T1">— настройки: голубой/серо-жемчужный;</text:span></text:p>
      <text:p text:style-name="P1"><text:span text:style-name="T1">— вторичные действия: кремовый.</text:span></text:p>
      <text:p text:style-name="P1"><text:span text:style-name="T1"/></text:p>
      <text:p text:style-name="P1"><text:span text:style-name="T1">Не использовать кислотный красный, синий, зеленый.</text:span></text:p>
      <text:p text:style-name="P1"><text:span text:style-name="T1"/></text:p>
      <text:p text:style-name="P1"><text:span text:style-name="T1">----------------------------------------------------</text:span></text:p>
      <text:p text:style-name="P1"><text:span text:style-name="T1">ПОЛЯ ВВОДА</text:span></text:p>
      <text:p text:style-name="P1"><text:span text:style-name="T1">----------------------------------------------------</text:span></text:p>
      <text:p text:style-name="P1"><text:span text:style-name="T1"/></text:p>
      <text:p text:style-name="P1"><text:span text:style-name="T1">input, select, textarea {</text:span></text:p>
      <text:p text:style-name="P1"><text:span text:style-name="T1"><text:s text:c="2"/>border: none;</text:span></text:p>
      <text:p text:style-name="P1"><text:span text:style-name="T1"><text:s text:c="2"/>border-radius: 18px;</text:span></text:p>
      <text:p text:style-name="P1"><text:span text:style-name="T1"><text:s text:c="2"/>padding: 10px 14px;</text:span></text:p>
      <text:p text:style-name="P1"><text:span text:style-name="T1"><text:s text:c="2"/>min-height: 40px;</text:span></text:p>
      <text:p text:style-name="P1"><text:span text:style-name="T1"><text:s text:c="2"/>background: var(--input);</text:span></text:p>
      <text:p text:style-name="P1"><text:span text:style-name="T1"><text:s text:c="2"/>color: var(--text);</text:span></text:p>
      <text:p text:style-name="P1"><text:span text:style-name="T1"><text:s text:c="2"/>font-size: 15px;</text:span></text:p>
      <text:p text:style-name="P1"><text:span text:style-name="T1"><text:s text:c="2"/>box-shadow:</text:span></text:p>
      <text:p text:style-name="P1"><text:span text:style-name="T1"><text:s text:c="4"/>inset 4px 4px 10px rgba(0,0,0,.05),</text:span></text:p>
      <text:p text:style-name="P1"><text:soft-page-break/><text:span text:style-name="T1"><text:s text:c="4"/>inset -4px -4px 10px rgba(255,255,255,.75);</text:span></text:p>
      <text:p text:style-name="P1"><text:span text:style-name="T1">}</text:span></text:p>
      <text:p text:style-name="P1"><text:span text:style-name="T1"/></text:p>
      <text:p text:style-name="P1"><text:span text:style-name="T1">Поля должны выглядеть слегка вдавленными в поверхность.</text:span></text:p>
      <text:p text:style-name="P1"><text:span text:style-name="T1"/></text:p>
      <text:p text:style-name="P1"><text:span text:style-name="T1">----------------------------------------------------</text:span></text:p>
      <text:p text:style-name="P1"><text:span text:style-name="T1">ТАБЛИЦЫ</text:span></text:p>
      <text:p text:style-name="P1"><text:span text:style-name="T1">----------------------------------------------------</text:span></text:p>
      <text:p text:style-name="P1"><text:span text:style-name="T1"/></text:p>
      <text:p text:style-name="P1"><text:span text:style-name="T1">Таблицы должны быть рабочими, компактными и читаемыми.</text:span></text:p>
      <text:p text:style-name="P1"><text:span text:style-name="T1"/></text:p>
      <text:p text:style-name="P1"><text:span text:style-name="T1">table {</text:span></text:p>
      <text:p text:style-name="P1"><text:span text:style-name="T1"><text:s text:c="2"/>width: 100%;</text:span></text:p>
      <text:p text:style-name="P1"><text:span text:style-name="T1"><text:s text:c="2"/>border-collapse: separate;</text:span></text:p>
      <text:p text:style-name="P1"><text:span text:style-name="T1"><text:s text:c="2"/>border-spacing: 0;</text:span></text:p>
      <text:p text:style-name="P1"><text:span text:style-name="T1"><text:s text:c="2"/>table-layout: fixed;</text:span></text:p>
      <text:p text:style-name="P1"><text:span text:style-name="T1"><text:s text:c="2"/>font-size: 14px;</text:span></text:p>
      <text:p text:style-name="P1"><text:span text:style-name="T1">}</text:span></text:p>
      <text:p text:style-name="P1"><text:span text:style-name="T1"/></text:p>
      <text:p text:style-name="P1"><text:span text:style-name="T1">th, td {</text:span></text:p>
      <text:p text:style-name="P1"><text:span text:style-name="T1"><text:s text:c="2"/>border-bottom: 1px solid var(--line);</text:span></text:p>
      <text:p text:style-name="P1"><text:span text:style-name="T1"><text:s text:c="2"/>padding: 7px 8px;</text:span></text:p>
      <text:p text:style-name="P1"><text:span text:style-name="T1"><text:s text:c="2"/>vertical-align: middle;</text:span></text:p>
      <text:p text:style-name="P1"><text:span text:style-name="T1">}</text:span></text:p>
      <text:p text:style-name="P1"><text:span text:style-name="T1"/></text:p>
      <text:p text:style-name="P1"><text:span text:style-name="T1">th {</text:span></text:p>
      <text:p text:style-name="P1"><text:span text:style-name="T1"><text:s text:c="2"/>white-space: nowrap;</text:span></text:p>
      <text:p text:style-name="P1"><text:span text:style-name="T1"><text:s text:c="2"/>font-size: 13px;</text:span></text:p>
      <text:p text:style-name="P1"><text:span text:style-name="T1"><text:s text:c="2"/>color: var(--muted);</text:span></text:p>
      <text:p text:style-name="P1"><text:span text:style-name="T1"><text:s text:c="2"/>background: rgba(255,255,255,.28);</text:span></text:p>
      <text:p text:style-name="P1"><text:span text:style-name="T1">}</text:span></text:p>
      <text:p text:style-name="P1"><text:span text:style-name="T1"/></text:p>
      <text:p text:style-name="P1"><text:span text:style-name="T1">В редакторе рецепта:</text:span></text:p>
      <text:p text:style-name="P1"><text:span text:style-name="T1">— названия ингредиентов выравнивать влево;</text:span></text:p>
      <text:p text:style-name="P1"><text:span text:style-name="T1">— количества по центру;</text:span></text:p>
      <text:p text:style-name="P1"><text:span text:style-name="T1">— кнопки удаления по центру.</text:span></text:p>
      <text:p text:style-name="P1"><text:span text:style-name="T1"/></text:p>
      <text:p text:style-name="P1"><text:span text:style-name="T1">----------------------------------------------------</text:span></text:p>
      <text:p text:style-name="P1"><text:span text:style-name="T1">КАТЕГОРИИ И ИКОНКИ</text:span></text:p>
      <text:p text:style-name="P1"><text:span text:style-name="T1">----------------------------------------------------</text:span></text:p>
      <text:p text:style-name="P1"><text:span text:style-name="T1"/></text:p>
      <text:p text:style-name="P1"><text:span text:style-name="T1">Строки категорий должны быть компактными, но красивыми.</text:span></text:p>
      <text:p text:style-name="P1"><text:span text:style-name="T1"/></text:p>
      <text:p text:style-name="P1"><text:span text:style-name="T1">Иконки:</text:span></text:p>
      <text:p text:style-name="P1"><text:soft-page-break/><text:span text:style-name="T1">— крупные;</text:span></text:p>
      <text:p text:style-name="P1"><text:span text:style-name="T1">— читаемые;</text:span></text:p>
      <text:p text:style-name="P1"><text:span text:style-name="T1">— не растянутые;</text:span></text:p>
      <text:p text:style-name="P1"><text:span text:style-name="T1">— не раздувают строку;</text:span></text:p>
      <text:p text:style-name="P1"><text:span text:style-name="T1">— пустые прозрачные края PNG можно обрезать;</text:span></text:p>
      <text:p text:style-name="P1"><text:span text:style-name="T1">— значимая часть рисунка не должна обрезаться.</text:span></text:p>
      <text:p text:style-name="P1"><text:span text:style-name="T1"/></text:p>
      <text:p text:style-name="P1"><text:span text:style-name="T1">CSS:</text:span></text:p>
      <text:p text:style-name="P1"><text:span text:style-name="T1"/></text:p>
      <text:p text:style-name="P1"><text:span text:style-name="T1">details.group {</text:span></text:p>
      <text:p text:style-name="P1"><text:span text:style-name="T1"><text:s text:c="2"/>border: 1px solid var(--line);</text:span></text:p>
      <text:p text:style-name="P1"><text:span text:style-name="T1"><text:s text:c="2"/>border-radius: 20px;</text:span></text:p>
      <text:p text:style-name="P1"><text:span text:style-name="T1"><text:s text:c="2"/>padding: 0 10px 10px;</text:span></text:p>
      <text:p text:style-name="P1"><text:span text:style-name="T1"><text:s text:c="2"/>margin-top: 9px;</text:span></text:p>
      <text:p text:style-name="P1"><text:span text:style-name="T1"><text:s text:c="2"/>background: rgba(255,255,255,.18);</text:span></text:p>
      <text:p text:style-name="P1"><text:span text:style-name="T1">}</text:span></text:p>
      <text:p text:style-name="P1"><text:span text:style-name="T1"/></text:p>
      <text:p text:style-name="P1"><text:span text:style-name="T1">details.group &gt; summary {</text:span></text:p>
      <text:p text:style-name="P1"><text:span text:style-name="T1"><text:s text:c="2"/>cursor: pointer;</text:span></text:p>
      <text:p text:style-name="P1"><text:span text:style-name="T1"><text:s text:c="2"/>min-height: 62px;</text:span></text:p>
      <text:p text:style-name="P1"><text:span text:style-name="T1"><text:s text:c="2"/>padding: 7px 8px;</text:span></text:p>
      <text:p text:style-name="P1"><text:span text:style-name="T1"><text:s text:c="2"/>font-weight: 700;</text:span></text:p>
      <text:p text:style-name="P1"><text:span text:style-name="T1"><text:s text:c="2"/>display: flex;</text:span></text:p>
      <text:p text:style-name="P1"><text:span text:style-name="T1"><text:s text:c="2"/>align-items: center;</text:span></text:p>
      <text:p text:style-name="P1"><text:span text:style-name="T1"><text:s text:c="2"/>justify-content: space-between;</text:span></text:p>
      <text:p text:style-name="P1"><text:span text:style-name="T1"><text:s text:c="2"/>gap: 10px;</text:span></text:p>
      <text:p text:style-name="P1"><text:span text:style-name="T1"><text:s text:c="2"/>line-height: 1.2;</text:span></text:p>
      <text:p text:style-name="P1"><text:span text:style-name="T1">}</text:span></text:p>
      <text:p text:style-name="P1"><text:span text:style-name="T1"/></text:p>
      <text:p text:style-name="P1"><text:span text:style-name="T1">.category-icon {</text:span></text:p>
      <text:p text:style-name="P1"><text:span text:style-name="T1"><text:s text:c="2"/>width: 50px;</text:span></text:p>
      <text:p text:style-name="P1"><text:span text:style-name="T1"><text:s text:c="2"/>height: 50px;</text:span></text:p>
      <text:p text:style-name="P1"><text:span text:style-name="T1"><text:s text:c="2"/>min-width: 50px;</text:span></text:p>
      <text:p text:style-name="P1"><text:span text:style-name="T1"><text:s text:c="2"/>display: inline-flex;</text:span></text:p>
      <text:p text:style-name="P1"><text:span text:style-name="T1"><text:s text:c="2"/>align-items: center;</text:span></text:p>
      <text:p text:style-name="P1"><text:span text:style-name="T1"><text:s text:c="2"/>justify-content: center;</text:span></text:p>
      <text:p text:style-name="P1"><text:span text:style-name="T1"><text:s text:c="2"/>overflow: hidden;</text:span></text:p>
      <text:p text:style-name="P1"><text:span text:style-name="T1"><text:s text:c="2"/>border-radius: 14px;</text:span></text:p>
      <text:p text:style-name="P1"><text:span text:style-name="T1"><text:s text:c="2"/>margin-right: 10px;</text:span></text:p>
      <text:p text:style-name="P1"><text:span text:style-name="T1"><text:s text:c="2"/>background: transparent;</text:span></text:p>
      <text:p text:style-name="P1"><text:span text:style-name="T1">}</text:span></text:p>
      <text:p text:style-name="P1"><text:span text:style-name="T1"/></text:p>
      <text:p text:style-name="P1"><text:span text:style-name="T1">.category-icon img {</text:span></text:p>
      <text:p text:style-name="P1"><text:span text:style-name="T1"><text:s text:c="2"/>width: 64px;</text:span></text:p>
      <text:p text:style-name="P1"><text:soft-page-break/><text:span text:style-name="T1"><text:s text:c="2"/>height: 64px;</text:span></text:p>
      <text:p text:style-name="P1"><text:span text:style-name="T1"><text:s text:c="2"/>object-fit: contain;</text:span></text:p>
      <text:p text:style-name="P1"><text:span text:style-name="T1"><text:s text:c="2"/>object-position: center;</text:span></text:p>
      <text:p text:style-name="P1"><text:span text:style-name="T1"><text:s text:c="2"/>display: block;</text:span></text:p>
      <text:p text:style-name="P1"><text:span text:style-name="T1">}</text:span></text:p>
      <text:p text:style-name="P1"><text:span text:style-name="T1"/></text:p>
      <text:p text:style-name="P1"><text:span text:style-name="T1">----------------------------------------------------</text:span></text:p>
      <text:p text:style-name="P1"><text:span text:style-name="T1">КАРТОЧКИ РЕЦЕПТОВ</text:span></text:p>
      <text:p text:style-name="P1"><text:span text:style-name="T1">----------------------------------------------------</text:span></text:p>
      <text:p text:style-name="P1"><text:span text:style-name="T1"/></text:p>
      <text:p text:style-name="P1"><text:span text:style-name="T1">Карточки должны быть мягкими 3D.</text:span></text:p>
      <text:p text:style-name="P1"><text:span text:style-name="T1"/></text:p>
      <text:p text:style-name="P1"><text:span text:style-name="T1">.recipe-card {</text:span></text:p>
      <text:p text:style-name="P1"><text:span text:style-name="T1"><text:s text:c="2"/>min-width: 230px;</text:span></text:p>
      <text:p text:style-name="P1"><text:span text:style-name="T1"><text:s text:c="2"/>padding: 18px;</text:span></text:p>
      <text:p text:style-name="P1"><text:span text:style-name="T1"><text:s text:c="2"/>border-radius: 24px;</text:span></text:p>
      <text:p text:style-name="P1"><text:span text:style-name="T1"><text:s text:c="2"/>cursor: pointer;</text:span></text:p>
      <text:p text:style-name="P1"><text:span text:style-name="T1"><text:s text:c="2"/>color: #4b4036;</text:span></text:p>
      <text:p text:style-name="P1"><text:span text:style-name="T1"><text:s text:c="2"/>font-weight: 700;</text:span></text:p>
      <text:p text:style-name="P1"><text:span text:style-name="T1"><text:s text:c="2"/>box-shadow:</text:span></text:p>
      <text:p text:style-name="P1"><text:span text:style-name="T1"><text:s text:c="4"/>10px 12px 22px rgba(120,100,80,.22),</text:span></text:p>
      <text:p text:style-name="P1"><text:span text:style-name="T1"><text:s text:c="4"/>-5px -5px 14px rgba(255,255,255,.75),</text:span></text:p>
      <text:p text:style-name="P1"><text:span text:style-name="T1"><text:s text:c="4"/>inset 2px 2px 5px rgba(255,255,255,.75);</text:span></text:p>
      <text:p text:style-name="P1"><text:span text:style-name="T1"><text:s text:c="2"/>transition: .25s;</text:span></text:p>
      <text:p text:style-name="P1"><text:span text:style-name="T1">}</text:span></text:p>
      <text:p text:style-name="P1"><text:span text:style-name="T1"/></text:p>
      <text:p text:style-name="P1"><text:span text:style-name="T1">.recipe-card:hover {</text:span></text:p>
      <text:p text:style-name="P1"><text:span text:style-name="T1"><text:s text:c="2"/>transform: translateY(-5px) rotate(-1deg);</text:span></text:p>
      <text:p text:style-name="P1"><text:span text:style-name="T1">}</text:span></text:p>
      <text:p text:style-name="P1"><text:span text:style-name="T1"/></text:p>
      <text:p text:style-name="P1"><text:span text:style-name="T1">----------------------------------------------------</text:span></text:p>
      <text:p text:style-name="P1"><text:span text:style-name="T1">МОДАЛЬНЫЕ ОКНА</text:span></text:p>
      <text:p text:style-name="P1"><text:span text:style-name="T1">----------------------------------------------------</text:span></text:p>
      <text:p text:style-name="P1"><text:span text:style-name="T1"/></text:p>
      <text:p text:style-name="P1"><text:span text:style-name="T1">Модалки должны быть светлыми, мягкими, объемными.</text:span></text:p>
      <text:p text:style-name="P1"><text:span text:style-name="T1"/></text:p>
      <text:p text:style-name="P1"><text:span text:style-name="T1">.modal-overlay {</text:span></text:p>
      <text:p text:style-name="P1"><text:span text:style-name="T1"><text:s text:c="2"/>position: fixed;</text:span></text:p>
      <text:p text:style-name="P1"><text:span text:style-name="T1"><text:s text:c="2"/>inset: 0;</text:span></text:p>
      <text:p text:style-name="P1"><text:span text:style-name="T1"><text:s text:c="2"/>background: rgba(0,0,0,.42);</text:span></text:p>
      <text:p text:style-name="P1"><text:span text:style-name="T1"><text:s text:c="2"/>display: none;</text:span></text:p>
      <text:p text:style-name="P1"><text:span text:style-name="T1"><text:s text:c="2"/>align-items: center;</text:span></text:p>
      <text:p text:style-name="P1"><text:span text:style-name="T1"><text:s text:c="2"/>justify-content: center;</text:span></text:p>
      <text:p text:style-name="P1"><text:span text:style-name="T1"><text:s text:c="2"/>z-index: 1300;</text:span></text:p>
      <text:p text:style-name="P1"><text:soft-page-break/><text:span text:style-name="T1"><text:s text:c="2"/>padding: 18px;</text:span></text:p>
      <text:p text:style-name="P1"><text:span text:style-name="T1">}</text:span></text:p>
      <text:p text:style-name="P1"><text:span text:style-name="T1"/></text:p>
      <text:p text:style-name="P1"><text:span text:style-name="T1">.modal-card {</text:span></text:p>
      <text:p text:style-name="P1"><text:span text:style-name="T1"><text:s text:c="2"/>width: min(860px, 96vw);</text:span></text:p>
      <text:p text:style-name="P1"><text:span text:style-name="T1"><text:s text:c="2"/>background: rgba(255,255,255,.96);</text:span></text:p>
      <text:p text:style-name="P1"><text:span text:style-name="T1"><text:s text:c="2"/>border: 1px solid var(--line);</text:span></text:p>
      <text:p text:style-name="P1"><text:span text:style-name="T1"><text:s text:c="2"/>border-radius: 30px;</text:span></text:p>
      <text:p text:style-name="P1"><text:span text:style-name="T1"><text:s text:c="2"/>padding: 24px;</text:span></text:p>
      <text:p text:style-name="P1"><text:span text:style-name="T1"><text:s text:c="2"/>box-shadow:</text:span></text:p>
      <text:p text:style-name="P1"><text:span text:style-name="T1"><text:s text:c="4"/>0 30px 80px rgba(0,0,0,.18),</text:span></text:p>
      <text:p text:style-name="P1"><text:span text:style-name="T1"><text:s text:c="4"/>inset 3px 3px 8px rgba(255,255,255,.85);</text:span></text:p>
      <text:p text:style-name="P1"><text:span text:style-name="T1"><text:s text:c="2"/>backdrop-filter: blur(10px);</text:span></text:p>
      <text:p text:style-name="P1"><text:span text:style-name="T1"><text:s text:c="2"/>max-height: 92vh;</text:span></text:p>
      <text:p text:style-name="P1"><text:span text:style-name="T1"><text:s text:c="2"/>overflow: auto;</text:span></text:p>
      <text:p text:style-name="P1"><text:span text:style-name="T1">}</text:span></text:p>
      <text:p text:style-name="P1"><text:span text:style-name="T1"/></text:p>
      <text:p text:style-name="P1"><text:span text:style-name="T1">----------------------------------------------------</text:span></text:p>
      <text:p text:style-name="P1"><text:span text:style-name="T1">TOAST-УВЕДОМЛЕНИЯ</text:span></text:p>
      <text:p text:style-name="P1"><text:span text:style-name="T1">----------------------------------------------------</text:span></text:p>
      <text:p text:style-name="P1"><text:span text:style-name="T1"/></text:p>
      <text:p text:style-name="P1"><text:span text:style-name="T1">.toast {</text:span></text:p>
      <text:p text:style-name="P1"><text:span text:style-name="T1"><text:s text:c="2"/>position: fixed;</text:span></text:p>
      <text:p text:style-name="P1"><text:span text:style-name="T1"><text:s text:c="2"/>right: 24px;</text:span></text:p>
      <text:p text:style-name="P1"><text:span text:style-name="T1"><text:s text:c="2"/>bottom: 24px;</text:span></text:p>
      <text:p text:style-name="P1"><text:span text:style-name="T1"><text:s text:c="2"/>z-index: 1400;</text:span></text:p>
      <text:p text:style-name="P1"><text:span text:style-name="T1"><text:s text:c="2"/>max-width: 360px;</text:span></text:p>
      <text:p text:style-name="P1"><text:span text:style-name="T1"><text:s text:c="2"/>background: rgba(255,247,232,.96);</text:span></text:p>
      <text:p text:style-name="P1"><text:span text:style-name="T1"><text:s text:c="2"/>border: 1px solid var(--line);</text:span></text:p>
      <text:p text:style-name="P1"><text:span text:style-name="T1"><text:s text:c="2"/>border-radius: 18px;</text:span></text:p>
      <text:p text:style-name="P1"><text:span text:style-name="T1"><text:s text:c="2"/>padding: 13px 16px;</text:span></text:p>
      <text:p text:style-name="P1"><text:span text:style-name="T1"><text:s text:c="2"/>color: var(--text);</text:span></text:p>
      <text:p text:style-name="P1"><text:span text:style-name="T1"><text:s text:c="2"/>box-shadow: 0 14px 30px rgba(0,0,0,.14);</text:span></text:p>
      <text:p text:style-name="P1"><text:span text:style-name="T1"><text:s text:c="2"/>opacity: 0;</text:span></text:p>
      <text:p text:style-name="P1"><text:span text:style-name="T1"><text:s text:c="2"/>transform: translateY(12px);</text:span></text:p>
      <text:p text:style-name="P1"><text:span text:style-name="T1"><text:s text:c="2"/>transition: .25s;</text:span></text:p>
      <text:p text:style-name="P1"><text:span text:style-name="T1"><text:s text:c="2"/>pointer-events: none;</text:span></text:p>
      <text:p text:style-name="P1"><text:span text:style-name="T1">}</text:span></text:p>
      <text:p text:style-name="P1"><text:span text:style-name="T1"/></text:p>
      <text:p text:style-name="P1"><text:span text:style-name="T1">.toast.show {</text:span></text:p>
      <text:p text:style-name="P1"><text:span text:style-name="T1"><text:s text:c="2"/>opacity: 1;</text:span></text:p>
      <text:p text:style-name="P1"><text:span text:style-name="T1"><text:s text:c="2"/>transform: translateY(0);</text:span></text:p>
      <text:p text:style-name="P1"><text:span text:style-name="T1">}</text:span></text:p>
      <text:p text:style-name="P1"><text:span text:style-name="T1"/></text:p>
      <text:p text:style-name="P1"><text:soft-page-break/><text:span text:style-name="T1">----------------------------------------------------</text:span></text:p>
      <text:p text:style-name="P1"><text:span text:style-name="T1">АНИМАЦИИ</text:span></text:p>
      <text:p text:style-name="P1"><text:span text:style-name="T1">----------------------------------------------------</text:span></text:p>
      <text:p text:style-name="P1"><text:span text:style-name="T1"/></text:p>
      <text:p text:style-name="P1"><text:span text:style-name="T1">Анимации должны быть мягкими и короткими.</text:span></text:p>
      <text:p text:style-name="P1"><text:span text:style-name="T1"/></text:p>
      <text:p text:style-name="P1"><text:span text:style-name="T1">Использовать:</text:span></text:p>
      <text:p text:style-name="P1"><text:span text:style-name="T1">— fadeDrop;</text:span></text:p>
      <text:p text:style-name="P1"><text:span text:style-name="T1">— hover lift;</text:span></text:p>
      <text:p text:style-name="P1"><text:span text:style-name="T1">— row highlight;</text:span></text:p>
      <text:p text:style-name="P1"><text:span text:style-name="T1">— price highlight;</text:span></text:p>
      <text:p text:style-name="P1"><text:span text:style-name="T1">— modal fade.</text:span></text:p>
      <text:p text:style-name="P1"><text:span text:style-name="T1"/></text:p>
      <text:p text:style-name="P1"><text:span text:style-name="T1">Не использовать резкие, дерганые, слишком игровые анимации.</text:span></text:p>
      <text:p text:style-name="P1"><text:span text:style-name="T1"/></text:p>
      <text:p text:style-name="P1"><text:span text:style-name="T1">Пример:</text:span></text:p>
      <text:p text:style-name="P1"><text:span text:style-name="T1"/></text:p>
      <text:p text:style-name="P1"><text:span text:style-name="T1">@keyframes fadeDrop {</text:span></text:p>
      <text:p text:style-name="P1"><text:span text:style-name="T1"><text:s text:c="2"/>from {</text:span></text:p>
      <text:p text:style-name="P1"><text:span text:style-name="T1"><text:s text:c="4"/>opacity: 0;</text:span></text:p>
      <text:p text:style-name="P1"><text:span text:style-name="T1"><text:s text:c="4"/>transform: translateY(-6px);</text:span></text:p>
      <text:p text:style-name="P1"><text:span text:style-name="T1"><text:s text:c="2"/>}</text:span></text:p>
      <text:p text:style-name="P1"><text:span text:style-name="T1"><text:s text:c="2"/>to {</text:span></text:p>
      <text:p text:style-name="P1"><text:span text:style-name="T1"><text:s text:c="4"/>opacity: 1;</text:span></text:p>
      <text:p text:style-name="P1"><text:span text:style-name="T1"><text:s text:c="4"/>transform: translateY(0);</text:span></text:p>
      <text:p text:style-name="P1"><text:span text:style-name="T1"><text:s text:c="2"/>}</text:span></text:p>
      <text:p text:style-name="P1"><text:span text:style-name="T1">}</text:span></text:p>
      <text:p text:style-name="P1"><text:span text:style-name="T1"/></text:p>
      <text:p text:style-name="P1"><text:span text:style-name="T1">----------------------------------------------------</text:span></text:p>
      <text:p text:style-name="P1"><text:span text:style-name="T1">ПОДСВЕТКА ОБНОВЛЕНИЙ</text:span></text:p>
      <text:p text:style-name="P1"><text:span text:style-name="T1">----------------------------------------------------</text:span></text:p>
      <text:p text:style-name="P1"><text:span text:style-name="T1"/></text:p>
      <text:p text:style-name="P1"><text:span text:style-name="T1">Для новой строки:</text:span></text:p>
      <text:p text:style-name="P1"><text:span text:style-name="T1">мягкая зеленая подсветка.</text:span></text:p>
      <text:p text:style-name="P1"><text:span text:style-name="T1"/></text:p>
      <text:p text:style-name="P1"><text:span text:style-name="T1">Для обновленной цены:</text:span></text:p>
      <text:p text:style-name="P1"><text:span text:style-name="T1">мягкая золотая подсветка.</text:span></text:p>
      <text:p text:style-name="P1"><text:span text:style-name="T1"/></text:p>
      <text:p text:style-name="P1"><text:span text:style-name="T1">.row-added-highlight {</text:span></text:p>
      <text:p text:style-name="P1"><text:span text:style-name="T1"><text:s text:c="2"/>animation: rowAddedPulse 2.8s ease;</text:span></text:p>
      <text:p text:style-name="P1"><text:span text:style-name="T1">}</text:span></text:p>
      <text:p text:style-name="P1"><text:span text:style-name="T1"/></text:p>
      <text:p text:style-name="P1"><text:span text:style-name="T1">.row-price-highlight {</text:span></text:p>
      <text:p text:style-name="P1"><text:span text:style-name="T1"><text:s text:c="2"/>animation: rowPricePulse 2.8s ease;</text:span></text:p>
      <text:p text:style-name="P1"><text:soft-page-break/><text:span text:style-name="T1">}</text:span></text:p>
      <text:p text:style-name="P1"><text:span text:style-name="T1"/></text:p>
      <text:p text:style-name="P1"><text:span text:style-name="T1">.price-cell-highlight {</text:span></text:p>
      <text:p text:style-name="P1"><text:span text:style-name="T1"><text:s text:c="2"/>animation: priceCellPulse 2.8s ease;</text:span></text:p>
      <text:p text:style-name="P1"><text:span text:style-name="T1">}</text:span></text:p>
      <text:p text:style-name="P1"><text:span text:style-name="T1"/></text:p>
      <text:p text:style-name="P1"><text:span text:style-name="T1">@keyframes rowAddedPulse {</text:span></text:p>
      <text:p text:style-name="P1"><text:span text:style-name="T1"><text:s text:c="2"/>0% { background: rgba(207,228,199,.78); }</text:span></text:p>
      <text:p text:style-name="P1"><text:span text:style-name="T1"><text:s text:c="2"/>100% { background: transparent; }</text:span></text:p>
      <text:p text:style-name="P1"><text:span text:style-name="T1">}</text:span></text:p>
      <text:p text:style-name="P1"><text:span text:style-name="T1"/></text:p>
      <text:p text:style-name="P1"><text:span text:style-name="T1">@keyframes rowPricePulse {</text:span></text:p>
      <text:p text:style-name="P1"><text:span text:style-name="T1"><text:s text:c="2"/>0% { background: rgba(244,215,161,.78); }</text:span></text:p>
      <text:p text:style-name="P1"><text:span text:style-name="T1"><text:s text:c="2"/>100% { background: transparent; }</text:span></text:p>
      <text:p text:style-name="P1"><text:span text:style-name="T1">}</text:span></text:p>
      <text:p text:style-name="P1"><text:span text:style-name="T1"/></text:p>
      <text:p text:style-name="P1"><text:span text:style-name="T1">----------------------------------------------------</text:span></text:p>
      <text:p text:style-name="P1"><text:span text:style-name="T1">ОБЩЕЕ ВИЗУАЛЬНОЕ КАЧЕСТВО</text:span></text:p>
      <text:p text:style-name="P1"><text:span text:style-name="T1">----------------------------------------------------</text:span></text:p>
      <text:p text:style-name="P1"><text:span text:style-name="T1"/></text:p>
      <text:p text:style-name="P1"><text:span text:style-name="T1">Интерфейс не должен выглядеть как стандартная таблица Excel.</text:span></text:p>
      <text:p text:style-name="P1"><text:span text:style-name="T1"/></text:p>
      <text:p text:style-name="P1"><text:span text:style-name="T1">Он должен ощущаться как:</text:span></text:p>
      <text:p text:style-name="P1"><text:span text:style-name="T1">— уютная рабочая кондитерская книга;</text:span></text:p>
      <text:p text:style-name="P1"><text:span text:style-name="T1">— премиальный калькулятор рецептов;</text:span></text:p>
      <text:p text:style-name="P1"><text:span text:style-name="T1">— дорогой pastry planner;</text:span></text:p>
      <text:p text:style-name="P1"><text:span text:style-name="T1">— мягкий визуальный инструмент для кухни.</text:span></text:p>
      <text:p text:style-name="P1"><text:span text:style-name="T1"/></text:p>
      <text:p text:style-name="P1"><text:span text:style-name="T1">Визуальные элементы должны быть едиными:</text:span></text:p>
      <text:p text:style-name="P1"><text:span text:style-name="T1">— одинаковые скругления;</text:span></text:p>
      <text:p text:style-name="P1"><text:span text:style-name="T1">— одинаковые тени;</text:span></text:p>
      <text:p text:style-name="P1"><text:span text:style-name="T1">— одинаковый свет;</text:span></text:p>
      <text:p text:style-name="P1"><text:span text:style-name="T1">— одинаковая цветовая температура;</text:span></text:p>
      <text:p text:style-name="P1"><text:span text:style-name="T1">— одинаковая высота кнопок;</text:span></text:p>
      <text:p text:style-name="P1"><text:span text:style-name="T1">— одинаковые отступы;</text:span></text:p>
      <text:p text:style-name="P1"><text:span text:style-name="T1">— одинаковый стиль иконок.</text:span></text:p>
      <text:p text:style-name="P1"><text:span text:style-name="T1"/></text:p>
      <text:p text:style-name="P1"><text:span text:style-name="T1">Не использовать:</text:span></text:p>
      <text:p text:style-name="P1"><text:span text:style-name="T1">— плоские серые кнопки;</text:span></text:p>
      <text:p text:style-name="P1"><text:span text:style-name="T1">— резкие черные тени;</text:span></text:p>
      <text:p text:style-name="P1"><text:span text:style-name="T1">— кислотные цвета;</text:span></text:p>
      <text:p text:style-name="P1"><text:span text:style-name="T1">— случайные emoji вместо иконок;</text:span></text:p>
      <text:p text:style-name="P1"><text:span text:style-name="T1">— разный стиль карточек;</text:span></text:p>
      <text:p text:style-name="P1"><text:span text:style-name="T1">— белые прямоугольники без фактуры;</text:span></text:p>
      <text:p text:style-name="P1"><text:soft-page-break/><text:span text:style-name="T1">— слишком плотный или слишком раздутый интерфейс.</text:span></text:p>
      <text:p text:style-name="P1"><text:span text:style-name="T1"><text:s/>==================================================== ПЕЧАТНЫЕ ШРИФТЫ ==================================================== Для печатных форм: Times New Roman line-height: — 1.0 для основного текста; — 1.2–1.3 для заголовков. Убрать лишние отступы до/после абзацев. Печатные формы должны быть компактными. Цель: по возможности техкарта на 1 лист. ==================================================== АДАПТИВНОСТЬ ==================================================== Приложение должно работать: — на десктопе; — ноутбуке; — планшете; — узких экранах. На узких экранах: — таблицы со скроллом; — панели в одну колонку; — кнопки переносятся; — карточки уменьшаются. ==================================================== УВЕДОМЛЕНИЯ ==================================================== Использовать toast. Toast: — справа снизу; — мягкий фон; — появляется на 2–4 секунды; — не перекрывает критичные элементы; — показывает успех, ошибку, предупреждение. ==================================================== ВАЛИДАЦИЯ ==================================================== Проверять: — пустое название рецепта; — пустой ингредиент; — некорректную цену; — некорректный вес упаковки; — отсутствие ингредиента в базе; — отсутствие цены; — дубли; — ошибки Excel; — пустой файл; — нераспознанные категории; — некорректные связанные ингредиенты; — деление на ноль; — отсутствие initialBaseWeight. ==================================================== ОСНОВНЫЕ JS-ФУНКЦИИ ==================================================== Реализовать функции: initApp() loadState() saveState() renderApp() createRecipe() saveRecipe() loadRecipe(id) deleteRecipe(id) renderRecipeCarousel() renderRecipeSearch() renderRecipeEditor() renderIngredientBase() openIngredientModal() saveIngredient() deleteIngredient() normalizeName() findIngredientByName() calculateUnitPrice() updateIngredientPriceDate() renderCategoryGroups() renderCategorySummary() addIngredientToCategory() removeIngredientFromCategory() getCategoryIcon() normalizeCategoryName() calculateInitialBaseWeight() calculateRecipeAmounts() calculateFormSizes() calculateRecipeCost() calculateFinancials() calculateLinkedIngredientCost() </text:span><text:soft-page-break/><text:span text:style-name="T1">saveLinkedRelation() calculateDerivedIngredientPrice() aggregateLinkedShoppingItems() importIngredientBaseFromExcel() importRecipeFromExcel() parseExcelRows() detectCategoryRows() detectTechnologyBlocks() detectAssemblyBlock() printTechCard() printShoppingList() printCostReport() saveBeautifulRecipePdf() uploadRecipePhoto() openCropModal() applyCrop() renderPhotoPreview() openSettings() saveSettings() applyTheme() updatePrintLogoPreview() showToast(message, type) ==================================================== ЧТО НЕЛЬЗЯ ДЕЛАТЬ ==================================================== Нельзя: — ломать расчетную архитектуру; — менять формулы без запроса; — смешивать техкарту и красивый PDF; — смешивать упаковку с производственными категориями; — создавать отдельные категории для ягод, коробок, насадок и т.д., если они должны быть наполнением общих категорий; — сохранять пересчитанный amount как baseAmount; — ломать связанные ингредиенты; — ломать импорт Excel; — ломать печатные формы; — использовать emoji вместо premium PNG-иконок; — генерировать новые иконки вместо уже согласованных; — делать строки категорий огромными из-за иконок; — растягивать иконки непропорционально; — обрезать значимую часть иконки; — использовать backend; — использовать React/Vue; — оставлять ключевую логику заглушками. ==================================================== ПРОВЕРКА ПОСЛЕ РЕАЛИЗАЦИИ ==================================================== Проверить: 1. Приложение открывается без ошибок. 2. HTML подключает CSS. 3. localStorage работает. 4. База ингредиентов сохраняется. 5. Ингредиент добавляется. 6. Ингредиент редактируется. 7. Цена за грамм считается. 8. Дата цены обновляется. 9. Подсветка цены работает. 10. Поиск базы ищет только по названию. 11. Дубли показываются конкретным списком. 12. Связанные ингредиенты сохраняются. 13. Связанные ингредиенты считают стоимость. 14. Производная цена заблокирована. 15. Закупка по связанным ингредиентам считает базовую позицию. 16. Рецепт сохраняется. 17. Рецепт открывается. 18. Рецепт удаляется. 19. baseAmount не портится после пересчета. 20. desiredWeight пересчитывает amount. 21. initialBaseWeight не перезаписывается случайно. 22. Упаковка не входит в вес. 23. Доставка не входит в вес. 24. Ганаш входит в вес, если он часть изделия. 25. Auto-ganache не сломан, если был включен. 26. Себестоимость считается. 27. Прибыль считается. 28. Наценка считается. 29. Закупка агрегирует одинаковые ингредиенты. 30. Импорт базы Excel работает. 31. Импорт рецепта Excel работает. 32. Сборка импортируется в assembly. 33. Технологии </text:span><text:soft-page-break/><text:span text:style-name="T1">попадают в свои категории. 34. Техкарта печатается отдельно. 35. Закупка печатается отдельно. 36. Себестоимость печатается отдельно. 37. Красивый PDF-рецепт сохраняется отдельно. 38. Фото загружается. 39. Кадрирование фото работает. 40. Галочка печати фото работает. 41. Иконки категорий соответствуют категориям. 42. «Фото и оформление рецепта» показывает premium camera. 43. «Ганаш» показывает жидкий шоколад/ганаш, не кусок торта. 44. Иконки крупные, но строки компактные. 45. Расстояние между категориями компактное. 46. Пустые края PNG визуально обрезаются. 47. Значимая часть иконки не обрезается. 48. Темы сохраняются. 49. Логотип печати работает. 50. В консоли нет ошибок.</text:span></text:p>
      <text:p text:style-name="P1"><text:span text:style-name="T1"/></text:p>
      <text:p text:style-name="P1"><text:span text:style-name="T1">====================================================</text:span></text:p>
      <text:p text:style-name="P1"><text:span text:style-name="T1">ДОПОЛНИТЕЛЬНЫЕ КРИТИЧЕСКИЕ ПРАВИЛА ВОССТАНОВЛЕНИЯ</text:span></text:p>
      <text:p text:style-name="P1"><text:span text:style-name="T1">====================================================</text:span></text:p>
      <text:p text:style-name="P1"><text:span text:style-name="T1"/></text:p>
      <text:p text:style-name="P1"><text:span text:style-name="T1">1. НЕ УДАЛЯТЬ ДАННЫЕ ПОЛЬЗОВАТЕЛЯ</text:span></text:p>
      <text:p text:style-name="P1"><text:span text:style-name="T1"/></text:p>
      <text:p text:style-name="P1"><text:span text:style-name="T1">При обновлении версии приложения нельзя очищать localStorage.</text:span></text:p>
      <text:p text:style-name="P1"><text:span text:style-name="T1"/></text:p>
      <text:p text:style-name="P1"><text:span text:style-name="T1">Нужно:</text:span></text:p>
      <text:p text:style-name="P1"><text:span text:style-name="T1">— читать старые данные;</text:span></text:p>
      <text:p text:style-name="P1"><text:span text:style-name="T1">— мягко мигрировать структуру, если появились новые поля;</text:span></text:p>
      <text:p text:style-name="P1"><text:span text:style-name="T1">— добавлять недостающие поля со значениями по умолчанию;</text:span></text:p>
      <text:p text:style-name="P1"><text:span text:style-name="T1">— не удалять рецепты;</text:span></text:p>
      <text:p text:style-name="P1"><text:span text:style-name="T1">— не удалять базу ингредиентов;</text:span></text:p>
      <text:p text:style-name="P1"><text:span text:style-name="T1">— не удалять фото;</text:span></text:p>
      <text:p text:style-name="P1"><text:span text:style-name="T1">— не удалять технологии;</text:span></text:p>
      <text:p text:style-name="P1"><text:span text:style-name="T1">— не удалять сборку;</text:span></text:p>
      <text:p text:style-name="P1"><text:span text:style-name="T1">— не удалять связанные ингредиенты;</text:span></text:p>
      <text:p text:style-name="P1"><text:span text:style-name="T1">— не удалять настройки темы.</text:span></text:p>
      <text:p text:style-name="P1"><text:span text:style-name="T1"/></text:p>
      <text:p text:style-name="P1"><text:span text:style-name="T1">Если структура данных изменилась, делать функцию миграции:</text:span></text:p>
      <text:p text:style-name="P1"><text:span text:style-name="T1"/></text:p>
      <text:p text:style-name="P1"><text:span text:style-name="T1">migrateState()</text:span></text:p>
      <text:p text:style-name="P1"><text:span text:style-name="T1"/></text:p>
      <text:p text:style-name="P1"><text:span text:style-name="T1">Она должна безопасно обновлять старые рецепты и старую базу до новой структуры.</text:span></text:p>
      <text:p text:style-name="P1"><text:span text:style-name="T1"/></text:p>
      <text:p text:style-name="P1"><text:span text:style-name="T1">----------------------------------------------------</text:span></text:p>
      <text:p text:style-name="P1"><text:span text:style-name="T1">2. ДВУХФАЙЛОВАЯ СБОРКА И ИКОНКИ</text:span></text:p>
      <text:p text:style-name="P1"><text:span text:style-name="T1"/></text:p>
      <text:p text:style-name="P1"><text:span text:style-name="T1">Если итог нужно выдать строго в двух файлах:</text:span></text:p>
      <text:p text:style-name="P1"><text:soft-page-break/><text:span text:style-name="T1"/></text:p>
      <text:p text:style-name="P1"><text:span text:style-name="T1">1. HTML</text:span></text:p>
      <text:p text:style-name="P1"><text:span text:style-name="T1">2. CSS</text:span></text:p>
      <text:p text:style-name="P1"><text:span text:style-name="T1"/></text:p>
      <text:p text:style-name="P1"><text:span text:style-name="T1">то иконки нельзя оставлять как отдельные обязательные PNG-файлы, иначе приложение перестанет быть двухфайловым.</text:span></text:p>
      <text:p text:style-name="P1"><text:span text:style-name="T1"/></text:p>
      <text:p text:style-name="P1"><text:span text:style-name="T1">В таком случае premium-иконки категорий нужно:</text:span></text:p>
      <text:p text:style-name="P1"><text:span text:style-name="T1">— либо встроить в HTML как base64/dataURL в categoryIconMap;</text:span></text:p>
      <text:p text:style-name="P1"><text:span text:style-name="T1">— либо оставить в HTML уже существующие встроенные data:image/png;base64;</text:span></text:p>
      <text:p text:style-name="P1"><text:span text:style-name="T1">— либо явно выдать отдельную папку assets/icons, если разрешена многофайловая сборка.</text:span></text:p>
      <text:p text:style-name="P1"><text:span text:style-name="T1"/></text:p>
      <text:p text:style-name="P1"><text:span text:style-name="T1">Для текущей рабочей версии предпочтительно:</text:span></text:p>
      <text:p text:style-name="P1"><text:span text:style-name="T1">— сохранить встроенные согласованные иконки;</text:span></text:p>
      <text:p text:style-name="P1"><text:span text:style-name="T1">— не заменять их emoji;</text:span></text:p>
      <text:p text:style-name="P1"><text:span text:style-name="T1">— не генерировать новые;</text:span></text:p>
      <text:p text:style-name="P1"><text:span text:style-name="T1">— не терять иконки при разделении HTML/CSS.</text:span></text:p>
      <text:p text:style-name="P1"><text:span text:style-name="T1"/></text:p>
      <text:p text:style-name="P1"><text:span text:style-name="T1">----------------------------------------------------</text:span></text:p>
      <text:p text:style-name="P1"><text:span text:style-name="T1">3. ЭКРАННЫЕ ИКОНКИ НЕ ДОЛЖНЫ ЛЕЗТЬ В ПЕЧАТЬ</text:span></text:p>
      <text:p text:style-name="P1"><text:span text:style-name="T1"/></text:p>
      <text:p text:style-name="P1"><text:span text:style-name="T1">Premium-иконки категорий нужны для интерфейса.</text:span></text:p>
      <text:p text:style-name="P1"><text:span text:style-name="T1"/></text:p>
      <text:p text:style-name="P1"><text:span text:style-name="T1">Они должны отображаться:</text:span></text:p>
      <text:p text:style-name="P1"><text:span text:style-name="T1">— в заголовках категорий;</text:span></text:p>
      <text:p text:style-name="P1"><text:span text:style-name="T1">— в списке категорий;</text:span></text:p>
      <text:p text:style-name="P1"><text:span text:style-name="T1">— в экранном UI.</text:span></text:p>
      <text:p text:style-name="P1"><text:span text:style-name="T1"/></text:p>
      <text:p text:style-name="P1"><text:span text:style-name="T1">Но они не должны самовольно попадать в:</text:span></text:p>
      <text:p text:style-name="P1"><text:span text:style-name="T1">— техкарту;</text:span></text:p>
      <text:p text:style-name="P1"><text:span text:style-name="T1">— закупку;</text:span></text:p>
      <text:p text:style-name="P1"><text:span text:style-name="T1">— себестоимость;</text:span></text:p>
      <text:p text:style-name="P1"><text:span text:style-name="T1">— печатные формы;</text:span></text:p>
      <text:p text:style-name="P1"><text:span text:style-name="T1">— PDF-документы,</text:span></text:p>
      <text:p text:style-name="P1"><text:span text:style-name="T1"/></text:p>
      <text:p text:style-name="P1"><text:span text:style-name="T1">если это отдельно не запрошено.</text:span></text:p>
      <text:p text:style-name="P1"><text:span text:style-name="T1"/></text:p>
      <text:p text:style-name="P1"><text:span text:style-name="T1">Печатные формы должны оставаться чистыми, компактными и рабочими.</text:span></text:p>
      <text:p text:style-name="P1"><text:span text:style-name="T1"/></text:p>
      <text:p text:style-name="P1"><text:span text:style-name="T1">----------------------------------------------------</text:span></text:p>
      <text:p text:style-name="P1"><text:span text:style-name="T1">4. РАСПОЛОЖЕНИЕ БЛОКОВ В РЕЦЕПТЕ</text:span></text:p>
      <text:p text:style-name="P1"><text:soft-page-break/><text:span text:style-name="T1"/></text:p>
      <text:p text:style-name="P1"><text:span text:style-name="T1">Сохранять рабочую структуру интерфейса рецепта:</text:span></text:p>
      <text:p text:style-name="P1"><text:span text:style-name="T1"/></text:p>
      <text:p text:style-name="P1"><text:span text:style-name="T1">— верхняя часть с данными рецепта / заказа;</text:span></text:p>
      <text:p text:style-name="P1"><text:span text:style-name="T1">— блок «Фото и оформление рецепта»;</text:span></text:p>
      <text:p text:style-name="P1"><text:span text:style-name="T1">— категории рецептуры;</text:span></text:p>
      <text:p text:style-name="P1"><text:span text:style-name="T1">— блок «Сборка»;</text:span></text:p>
      <text:p text:style-name="P1"><text:span text:style-name="T1">— блок «Финансовая информация»;</text:span></text:p>
      <text:p text:style-name="P1"><text:span text:style-name="T1">— кнопки печати и PDF.</text:span></text:p>
      <text:p text:style-name="P1"><text:span text:style-name="T1"/></text:p>
      <text:p text:style-name="P1"><text:span text:style-name="T1">Финансовая информация должна быть перед печатными действиями, чтобы пользователь видел итог до печати.</text:span></text:p>
      <text:p text:style-name="P1"><text:span text:style-name="T1"/></text:p>
      <text:p text:style-name="P1"><text:span text:style-name="T1">----------------------------------------------------</text:span></text:p>
      <text:p text:style-name="P1"><text:span text:style-name="T1">5. БЛОК «ФОТО И ОФОРМЛЕНИЕ РЕЦЕПТА»</text:span></text:p>
      <text:p text:style-name="P1"><text:span text:style-name="T1"/></text:p>
      <text:p text:style-name="P1"><text:span text:style-name="T1">Блок должен быть раскрывающимся.</text:span></text:p>
      <text:p text:style-name="P1"><text:span text:style-name="T1"/></text:p>
      <text:p text:style-name="P1"><text:span text:style-name="T1">Не дублировать главное фото дважды:</text:span></text:p>
      <text:p text:style-name="P1"><text:span text:style-name="T1">— если фото уже видно в предпросмотре/карточке, не выводить его повторно сверху без необходимости.</text:span></text:p>
      <text:p text:style-name="P1"><text:span text:style-name="T1"/></text:p>
      <text:p text:style-name="P1"><text:span text:style-name="T1">В блоке должны быть:</text:span></text:p>
      <text:p text:style-name="P1"><text:span text:style-name="T1">— загрузка фото;</text:span></text:p>
      <text:p text:style-name="P1"><text:span text:style-name="T1">— кадрирование;</text:span></text:p>
      <text:p text:style-name="P1"><text:span text:style-name="T1">— предпросмотр;</text:span></text:p>
      <text:p text:style-name="P1"><text:span text:style-name="T1">— галочка «Выводить фото в распечатку рецепта»;</text:span></text:p>
      <text:p text:style-name="P1"><text:span text:style-name="T1">— настройки красивого рецепта;</text:span></text:p>
      <text:p text:style-name="P1"><text:span text:style-name="T1">— предпросмотр фона/подложки;</text:span></text:p>
      <text:p text:style-name="P1"><text:span text:style-name="T1">— прозрачность подложки;</text:span></text:p>
      <text:p text:style-name="P1"><text:span text:style-name="T1">— выбор/замена фото;</text:span></text:p>
      <text:p text:style-name="P1"><text:span text:style-name="T1">— кнопки одинаковой высоты и визуального стиля.</text:span></text:p>
      <text:p text:style-name="P1"><text:span text:style-name="T1"/></text:p>
      <text:p text:style-name="P1"><text:span text:style-name="T1">----------------------------------------------------</text:span></text:p>
      <text:p text:style-name="P1"><text:span text:style-name="T1">6. КРАСИВЫЙ PDF И ТЕХКАРТА — СТРОГО РАЗНЫЕ ДОКУМЕНТЫ</text:span></text:p>
      <text:p text:style-name="P1"><text:span text:style-name="T1"/></text:p>
      <text:p text:style-name="P1"><text:span text:style-name="T1">Кнопка «Сохранить рецепт в PDF» сохраняет красивый рецепт.</text:span></text:p>
      <text:p text:style-name="P1"><text:span text:style-name="T1"/></text:p>
      <text:p text:style-name="P1"><text:span text:style-name="T1">Кнопка «Печать техкарты» печатает технологическую карту.</text:span></text:p>
      <text:p text:style-name="P1"><text:span text:style-name="T1"/></text:p>
      <text:p text:style-name="P1"><text:span text:style-name="T1">Кнопка «Печать закупки» печатает закупку.</text:span></text:p>
      <text:p text:style-name="P1"><text:span text:style-name="T1"/></text:p>
      <text:p text:style-name="P1"><text:span text:style-name="T1">Кнопка «Себестоимость» показывает/печатает себестоимость.</text:span></text:p>
      <text:p text:style-name="P1"><text:soft-page-break/><text:span text:style-name="T1"/></text:p>
      <text:p text:style-name="P1"><text:span text:style-name="T1">Нельзя подменять одно другим.</text:span></text:p>
      <text:p text:style-name="P1"><text:span text:style-name="T1"/></text:p>
      <text:p text:style-name="P1"><text:span text:style-name="T1">----------------------------------------------------</text:span></text:p>
      <text:p text:style-name="P1"><text:span text:style-name="T1">7. ПОРЯДОК КАТЕГОРИЙ</text:span></text:p>
      <text:p text:style-name="P1"><text:span text:style-name="T1"/></text:p>
      <text:p text:style-name="P1"><text:span text:style-name="T1">Категории должны отображаться в утверждённом порядке.</text:span></text:p>
      <text:p text:style-name="P1"><text:span text:style-name="T1"/></text:p>
      <text:p text:style-name="P1"><text:span text:style-name="T1">Сначала производственные категории:</text:span></text:p>
      <text:p text:style-name="P1"><text:span text:style-name="T1">— выпечка;</text:span></text:p>
      <text:p text:style-name="P1"><text:span text:style-name="T1">— кремы;</text:span></text:p>
      <text:p text:style-name="P1"><text:span text:style-name="T1">— начинки;</text:span></text:p>
      <text:p text:style-name="P1"><text:span text:style-name="T1">— застывает;</text:span></text:p>
      <text:p text:style-name="P1"><text:span text:style-name="T1">— ароматы;</text:span></text:p>
      <text:p text:style-name="P1"><text:span text:style-name="T1">— шоколад.</text:span></text:p>
      <text:p text:style-name="P1"><text:span text:style-name="T1"/></text:p>
      <text:p text:style-name="P1"><text:span text:style-name="T1">Затем служебные/общие:</text:span></text:p>
      <text:p text:style-name="P1"><text:span text:style-name="T1">— Инструменты;</text:span></text:p>
      <text:p text:style-name="P1"><text:span text:style-name="T1">— Декор;</text:span></text:p>
      <text:p text:style-name="P1"><text:span text:style-name="T1">— Упаковка;</text:span></text:p>
      <text:p text:style-name="P1"><text:span text:style-name="T1">— Доставка.</text:span></text:p>
      <text:p text:style-name="P1"><text:span text:style-name="T1"/></text:p>
      <text:p text:style-name="P1"><text:span text:style-name="T1">«Упаковка» и «Доставка» не должны смешиваться с производственной рецептурой.</text:span></text:p>
      <text:p text:style-name="P1"><text:span text:style-name="T1"/></text:p>
      <text:p text:style-name="P1"><text:span text:style-name="T1">----------------------------------------------------</text:span></text:p>
      <text:p text:style-name="P1"><text:span text:style-name="T1">8. КНОПКИ И ИХ ЛОГИКА</text:span></text:p>
      <text:p text:style-name="P1"><text:span text:style-name="T1"/></text:p>
      <text:p text:style-name="P1"><text:span text:style-name="T1">Сохранять существующие кнопки и их смысл.</text:span></text:p>
      <text:p text:style-name="P1"><text:span text:style-name="T1"/></text:p>
      <text:p text:style-name="P1"><text:span text:style-name="T1">Не переименовывать самовольно, кроме уже утверждённого:</text:span></text:p>
      <text:p text:style-name="P1"><text:span text:style-name="T1">«Сохранить PDF» → «Сохранить рецепт в PDF».</text:span></text:p>
      <text:p text:style-name="P1"><text:span text:style-name="T1"/></text:p>
      <text:p text:style-name="P1"><text:span text:style-name="T1">Основные кнопки:</text:span></text:p>
      <text:p text:style-name="P1"><text:span text:style-name="T1">— Сохранить рецепт;</text:span></text:p>
      <text:p text:style-name="P1"><text:span text:style-name="T1">— Редактировать рецепт;</text:span></text:p>
      <text:p text:style-name="P1"><text:span text:style-name="T1">— Удалить рецепт;</text:span></text:p>
      <text:p text:style-name="P1"><text:span text:style-name="T1">— Свернуть все;</text:span></text:p>
      <text:p text:style-name="P1"><text:span text:style-name="T1">— Развернуть все;</text:span></text:p>
      <text:p text:style-name="P1"><text:span text:style-name="T1">— Добавить ингредиент;</text:span></text:p>
      <text:p text:style-name="P1"><text:span text:style-name="T1">— Печать закупки;</text:span></text:p>
      <text:p text:style-name="P1"><text:span text:style-name="T1">— Печать техкарты;</text:span></text:p>
      <text:p text:style-name="P1"><text:span text:style-name="T1">— Себестоимость;</text:span></text:p>
      <text:p text:style-name="P1"><text:span text:style-name="T1">— Сохранить рецепт в PDF.</text:span></text:p>
      <text:p text:style-name="P1"><text:soft-page-break/><text:span text:style-name="T1"/></text:p>
      <text:p text:style-name="P1"><text:span text:style-name="T1">Не удалять кнопки, даже если кажется, что они дублируют функционал.</text:span></text:p>
      <text:p text:style-name="P1"><text:span text:style-name="T1"/></text:p>
      <text:p text:style-name="P1"><text:span text:style-name="T1">----------------------------------------------------</text:span></text:p>
      <text:p text:style-name="P1"><text:span text:style-name="T1">9. ПРАВИЛО МИНИМАЛЬНОГО ВМЕШАТЕЛЬСТВА</text:span></text:p>
      <text:p text:style-name="P1"><text:span text:style-name="T1"/></text:p>
      <text:p text:style-name="P1"><text:span text:style-name="T1">Если задача касается только визуала:</text:span></text:p>
      <text:p text:style-name="P1"><text:span text:style-name="T1">— менять только CSS/разметку визуального блока;</text:span></text:p>
      <text:p text:style-name="P1"><text:span text:style-name="T1">— не трогать расчеты;</text:span></text:p>
      <text:p text:style-name="P1"><text:span text:style-name="T1">— не трогать импорт;</text:span></text:p>
      <text:p text:style-name="P1"><text:span text:style-name="T1">— не трогать localStorage;</text:span></text:p>
      <text:p text:style-name="P1"><text:span text:style-name="T1">— не трогать печать;</text:span></text:p>
      <text:p text:style-name="P1"><text:span text:style-name="T1">— не трогать связанные ингредиенты.</text:span></text:p>
      <text:p text:style-name="P1"><text:span text:style-name="T1"/></text:p>
      <text:p text:style-name="P1"><text:span text:style-name="T1">Если задача касается расчета:</text:span></text:p>
      <text:p text:style-name="P1"><text:span text:style-name="T1">— менять только расчетную функцию;</text:span></text:p>
      <text:p text:style-name="P1"><text:span text:style-name="T1">— не переписывать весь интерфейс.</text:span></text:p>
      <text:p text:style-name="P1"><text:span text:style-name="T1"/></text:p>
      <text:p text:style-name="P1"><text:span text:style-name="T1">Если задача касается печати:</text:span></text:p>
      <text:p text:style-name="P1"><text:span text:style-name="T1">— менять только соответствующую печатную функцию;</text:span></text:p>
      <text:p text:style-name="P1"><text:span text:style-name="T1">— не менять экранный редактор.</text:span></text:p>
      <text:p text:style-name="P1"><text:span text:style-name="T1"/></text:p>
      <text:p text:style-name="P1"><text:span text:style-name="T1">----------------------------------------------------</text:span></text:p>
      <text:p text:style-name="P1"><text:span text:style-name="T1">10. ПРОВЕРКА ПОСЛЕ ЛЮБОГО ИЗМЕНЕНИЯ</text:span></text:p>
      <text:p text:style-name="P1"><text:span text:style-name="T1"/></text:p>
      <text:p text:style-name="P1"><text:span text:style-name="T1">После любого изменения обязательно проверить:</text:span></text:p>
      <text:p text:style-name="P1"><text:span text:style-name="T1"/></text:p>
      <text:p text:style-name="P1"><text:span text:style-name="T1">— консоль без ошибок;</text:span></text:p>
      <text:p text:style-name="P1"><text:span text:style-name="T1">— рецепт открывается;</text:span></text:p>
      <text:p text:style-name="P1"><text:span text:style-name="T1">— рецепт сохраняется;</text:span></text:p>
      <text:p text:style-name="P1"><text:span text:style-name="T1">— база ингредиентов открывается;</text:span></text:p>
      <text:p text:style-name="P1"><text:span text:style-name="T1">— цена за грамм считается;</text:span></text:p>
      <text:p text:style-name="P1"><text:span text:style-name="T1">— связанные ингредиенты не сломаны;</text:span></text:p>
      <text:p text:style-name="P1"><text:span text:style-name="T1">— пересчет веса работает;</text:span></text:p>
      <text:p text:style-name="P1"><text:span text:style-name="T1">— себестоимость не изменилась случайно;</text:span></text:p>
      <text:p text:style-name="P1"><text:span text:style-name="T1">— закупка агрегирует позиции;</text:span></text:p>
      <text:p text:style-name="P1"><text:span text:style-name="T1">— техкарта печатается;</text:span></text:p>
      <text:p text:style-name="P1"><text:span text:style-name="T1">— PDF-рецепт сохраняется;</text:span></text:p>
      <text:p text:style-name="P1"><text:span text:style-name="T1">— иконки не пропали;</text:span></text:p>
      <text:p text:style-name="P1"><text:span text:style-name="T1">— CSS подключен;</text:span></text:p>
      <text:p text:style-name="P1"><text:span text:style-name="T1">— мобильная адаптация не развалилась.</text:span></text:p>
      <text:p text:style-name="P1"><text:span text:style-name="T1"/></text:p>
      <text:p text:style-name="P1"><text:span text:style-name="T1"><text:s/>==================================================== </text:span><text:soft-page-break/><text:span text:style-name="T1">ФИНАЛЬНЫЙ РЕЗУЛЬТАТ ==================================================== Выдать: 1. index.html 2. style.css Код должен быть полным, готовым к запуску. Никаких фрагментов вместо полного приложения. Никаких псевдозаглушек в ключевой логике. В конце коротко указать: — какие модули реализованы; — где хранятся данные; — какие расчеты используются; — как подключены иконки; — что печатные формы отделены от красивого PDF; — как запустить приложение. ``` Вот этот вариант уже можно считать **более точным паспортом приложения**: он включает и нашу текущую визуальную правку по иконкам, и связанную механику, и запреты на поломку логики, и раздельные HTML/CS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0.34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54M23S</meta:editing-duration>
    <meta:editing-cycles>7</meta:editing-cycles>
    <meta:generator>OpenOffice/4.1.15$Win32 OpenOffice.org_project/4115m2$Build-9813</meta:generator>
    <dc:date>2026-05-22T04:26:30.91</dc:date>
    <meta:document-statistic meta:table-count="0" meta:image-count="0" meta:object-count="0" meta:page-count="48" meta:paragraph-count="1048" meta:word-count="7653" meta:character-count="68121"/>
    <meta:user-defined meta:name="Info 1"/>
    <meta:user-defined meta:name="Info 2"/>
    <meta:user-defined meta:name="Info 3"/>
    <meta:user-defined meta:name="Info 4"/>
  </office:meta>
</office:document-meta>
</file>